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07940000491200007EB61F7ABE8E.pdf" manifest:media-type="application/pdf"/>
  <manifest:file-entry manifest:full-path="Pictures/100149EE000058930000BC84AF44FE10.pdf" manifest:media-type="application/pdf"/>
  <manifest:file-entry manifest:full-path="Pictures/10000001000003590000072033B6F70C.png" manifest:media-type="image/png"/>
  <manifest:file-entry manifest:full-path="Pictures/1000000100000404000005F060CC5570.png" manifest:media-type="image/png"/>
  <manifest:file-entry manifest:full-path="Pictures/100000010000027C000002F8FB74275C.png" manifest:media-type="image/png"/>
  <manifest:file-entry manifest:full-path="Pictures/100134A700006A3F00009D19D877D54A.pdf" manifest:media-type="application/pdf"/>
  <manifest:file-entry manifest:full-path="Pictures/1000000100000E160000053BC1172DFB.png" manifest:media-type="image/png"/>
  <manifest:file-entry manifest:full-path="Pictures/10000001000003BC000000AEA37A2267.png" manifest:media-type="image/png"/>
  <manifest:file-entry manifest:full-path="Pictures/10000001000002450000029C61C6DD6B.png" manifest:media-type="image/png"/>
  <manifest:file-entry manifest:full-path="Pictures/10000000000006400000015E16828E3F.jpg" manifest:media-type="image/jpeg"/>
  <manifest:file-entry manifest:full-path="Pictures/10000001000002C3000004CA2B6F16A7.png" manifest:media-type="image/png"/>
  <manifest:file-entry manifest:full-path="Pictures/10000000000002EE000000D202A2374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álico" style:font-family-generic="swiss" style:font-pitch="variable"/>
    <style:font-face style:name="Arial4" svg:font-family="Arial" style:font-adornments="Negrito" style:font-family-generic="swiss" style:font-pitch="variable"/>
    <style:font-face style:name="Arial5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1" style:family="table">
      <style:table-properties style:width="15.778cm" fo:margin-left="-0.011cm" fo:margin-top="0cm" fo:margin-bottom="0cm" table:align="left" style:writing-mode="page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.746cm"/>
    </style:style>
    <style:style style:name="Tabela1.D" style:family="table-column">
      <style:table-column-properties style:column-width="2.752cm"/>
    </style:style>
    <style:style style:name="Tabela1.E" style:family="table-column">
      <style:table-column-properties style:column-width="8.264cm"/>
    </style:style>
    <style:style style:name="Tabela1.1" style:family="table-row">
      <style:table-row-properties style:min-row-height="0.82cm" fo:keep-together="auto"/>
    </style:style>
    <style:style style:name="Tabela1.A1" style:family="table-cell">
      <style:table-cell-properties style:vertical-align="middle" fo:background-color="#0070c0" fo:padding="0cm" fo:border="0.5pt solid #000000">
        <style:background-image/>
      </style:table-cell-properties>
    </style:style>
    <style:style style:name="Tabela1.D1" style:family="table-cell">
      <style:table-cell-properties style:vertical-align="middle" fo:background-color="#0070c0" fo:padding-left="0.018cm" fo:padding-right="0.018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868cm" fo:keep-together="auto"/>
    </style:style>
    <style:style style:name="Tabela1.A2" style:family="table-cell">
      <style:table-cell-properties style:vertical-align="middle" fo:padding="0cm" fo:border="0.5pt solid #000000"/>
    </style:style>
    <style:style style:name="Tabela1.B2" style:family="table-cell">
      <style:table-cell-properties style:vertical-align="middle" fo:padding="0cm" fo:border="0.5pt solid #000000"/>
    </style:style>
    <style:style style:name="Tabela1.C2" style:family="table-cell">
      <style:table-cell-properties style:vertical-align="middle" fo:padding="0cm" fo:border="0.5pt solid #000000"/>
    </style:style>
    <style:style style:name="Tabela1.D2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2" style:family="table-cell">
      <style:table-cell-properties style:vertical-align="middle" fo:padding="0cm" fo:border="0.5pt solid #000000"/>
    </style:style>
    <style:style style:name="Tabela1.3" style:family="table-row">
      <style:table-row-properties style:min-row-height="0.896cm" fo:keep-together="auto"/>
    </style:style>
    <style:style style:name="Tabela1.A3" style:family="table-cell">
      <style:table-cell-properties style:vertical-align="middle" fo:padding="0cm" fo:border="0.5pt solid #000000"/>
    </style:style>
    <style:style style:name="Tabela1.B3" style:family="table-cell">
      <style:table-cell-properties style:vertical-align="middle" fo:padding="0cm" fo:border="0.5pt solid #000000"/>
    </style:style>
    <style:style style:name="Tabela1.C3" style:family="table-cell">
      <style:table-cell-properties style:vertical-align="middle" fo:padding="0cm" fo:border="0.5pt solid #000000"/>
    </style:style>
    <style:style style:name="Tabela1.D3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3" style:family="table-cell">
      <style:table-cell-properties style:vertical-align="middle" fo:padding="0cm" fo:border="0.5pt solid #000000"/>
    </style:style>
    <style:style style:name="Tabela1.A4" style:family="table-cell">
      <style:table-cell-properties style:vertical-align="middle" fo:padding="0cm" fo:border="0.5pt solid #000000"/>
    </style:style>
    <style:style style:name="Tabela1.B4" style:family="table-cell">
      <style:table-cell-properties style:vertical-align="middle" fo:padding="0cm" fo:border="0.5pt solid #000000"/>
    </style:style>
    <style:style style:name="Tabela1.C4" style:family="table-cell">
      <style:table-cell-properties style:vertical-align="middle" fo:padding="0cm" fo:border="0.5pt solid #000000"/>
    </style:style>
    <style:style style:name="Tabela1.D4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4" style:family="table-cell">
      <style:table-cell-properties style:vertical-align="middle" fo:padding="0cm" fo:border="0.5pt solid #000000"/>
    </style:style>
    <style:style style:name="Tabela1.5" style:family="table-row">
      <style:table-row-properties style:min-row-height="4.951cm" fo:keep-together="auto"/>
    </style:style>
    <style:style style:name="Tabela1.A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1.655cm" fo:keep-together="auto"/>
    </style:style>
    <style:style style:name="Tabela1.A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1.588cm" fo:keep-together="auto"/>
    </style:style>
    <style:style style:name="Tabela1.A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7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8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9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10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11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11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11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11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1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1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1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12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1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13" style:family="table-row">
      <style:table-row-properties style:min-row-height="2.117cm" fo:keep-together="auto"/>
    </style:style>
    <style:style style:name="Tabela1.A1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1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1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13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1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2" style:family="table">
      <style:table-properties style:width="15.743cm" fo:margin-left="0.009cm" fo:margin-top="0cm" fo:margin-bottom="0cm" table:align="left" style:writing-mode="lr-tb"/>
    </style:style>
    <style:style style:name="Tabela2.A" style:family="table-column">
      <style:table-column-properties style:column-width="4.741cm"/>
    </style:style>
    <style:style style:name="Tabela2.B" style:family="table-column">
      <style:table-column-properties style:column-width="11.001cm"/>
    </style:style>
    <style:style style:name="Tabela2.1" style:family="table-row">
      <style:table-row-properties style:min-row-height="0.609cm" fo:keep-together="auto"/>
    </style:style>
    <style:style style:name="Tabela2.A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2.872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ela2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4" style:family="table-row">
      <style:table-row-properties fo:keep-together="auto"/>
    </style:style>
    <style:style style:name="Tabe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2.5" style:family="table-row">
      <style:table-row-properties style:min-row-height="0.102cm" fo:keep-together="auto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743cm" table:align="left" style:writing-mode="lr-tb"/>
    </style:style>
    <style:style style:name="Tabela8.A" style:family="table-column">
      <style:table-column-properties style:column-width="4.815cm"/>
    </style:style>
    <style:style style:name="Tabela8.B" style:family="table-column">
      <style:table-column-properties style:column-width="10.927cm"/>
    </style:style>
    <style:style style:name="Tabela8.1" style:family="table-row">
      <style:table-row-properties style:min-row-height="0.503cm" fo:background-color="#2a6099">
        <style:background-image/>
      </style:table-row-properties>
    </style:style>
    <style:style style:name="Tabela8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8.B1" style:family="table-cell">
      <style:table-cell-properties fo:background-color="#2a6099" fo:padding="0.097cm" fo:border="0.5pt solid #000000">
        <style:background-image/>
      </style:table-cell-properties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0.5pt solid #000000" fo:border-top="none" fo:border-bottom="0.5pt solid #000000"/>
    </style:style>
    <style:style style:name="Tabela8.4" style:family="table-row">
      <style:table-row-properties style:min-row-height="2.048cm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5.799cm" fo:margin-left="0.009cm" fo:margin-top="0cm" fo:margin-bottom="0cm" table:align="left" style:writing-mode="lr-tb"/>
    </style:style>
    <style:style style:name="Tabela3.A" style:family="table-column">
      <style:table-column-properties style:column-width="3.568cm"/>
    </style:style>
    <style:style style:name="Tabela3.B" style:family="table-column">
      <style:table-column-properties style:column-width="5.345cm"/>
    </style:style>
    <style:style style:name="Tabela3.C" style:family="table-column">
      <style:table-column-properties style:column-width="6.88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841cm" fo:keep-together="auto"/>
    </style:style>
    <style:style style:name="Tabela3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3" style:family="table-row">
      <style:table-row-properties style:min-row-height="0.572cm" fo:keep-together="auto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4" style:family="table-row">
      <style:table-row-properties style:min-row-height="0.6cm" fo:keep-together="auto"/>
    </style:style>
    <style:style style:name="Tabela3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C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5" style:family="table-row">
      <style:table-row-properties style:min-row-height="0.102cm" fo:keep-together="auto"/>
    </style:style>
    <style:style style:name="Tabela3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5.736cm" fo:margin-left="0.009cm" fo:margin-top="0cm" fo:margin-bottom="0cm" table:align="left" style:writing-mode="lr-tb"/>
    </style:style>
    <style:style style:name="Tabela4.A" style:family="table-column">
      <style:table-column-properties style:column-width="3.568cm"/>
    </style:style>
    <style:style style:name="Tabela4.B" style:family="table-column">
      <style:table-column-properties style:column-width="5.343cm"/>
    </style:style>
    <style:style style:name="Tabela4.C" style:family="table-column">
      <style:table-column-properties style:column-width="6.82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5.634cm" fo:keep-together="auto"/>
    </style:style>
    <style:style style:name="Tabela4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3" style:family="table-row">
      <style:table-row-properties style:min-row-height="3.387cm" fo:keep-together="auto"/>
    </style:style>
    <style:style style:name="Tabela4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4" style:family="table-row">
      <style:table-row-properties style:min-row-height="0.579cm" fo:keep-together="auto"/>
    </style:style>
    <style:style style:name="Tabela4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" style:family="table">
      <style:table-properties style:width="15.736cm" fo:margin-left="0.009cm" fo:margin-top="0cm" fo:margin-bottom="0cm" table:align="left" style:writing-mode="lr-tb"/>
    </style:style>
    <style:style style:name="Tabela19.A" style:family="table-column">
      <style:table-column-properties style:column-width="3.568cm"/>
    </style:style>
    <style:style style:name="Tabela19.B" style:family="table-column">
      <style:table-column-properties style:column-width="5.343cm"/>
    </style:style>
    <style:style style:name="Tabela19.C" style:family="table-column">
      <style:table-column-properties style:column-width="6.824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9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" style:family="table">
      <style:table-properties style:width="15.762cm" fo:margin-left="-0.011cm" fo:margin-top="0cm" fo:margin-bottom="0cm" table:align="left" style:writing-mode="lr-tb"/>
    </style:style>
    <style:style style:name="Tabela20.A" style:family="table-column">
      <style:table-column-properties style:column-width="5.609cm"/>
    </style:style>
    <style:style style:name="Tabela20.B" style:family="table-column">
      <style:table-column-properties style:column-width="5.689cm"/>
    </style:style>
    <style:style style:name="Tabela20.C" style:family="table-column">
      <style:table-column-properties style:column-width="4.464cm"/>
    </style:style>
    <style:style style:name="Tabela20.1" style:family="table-row">
      <style:table-row-properties style:min-row-height="1.376cm" fo:keep-together="auto"/>
    </style:style>
    <style:style style:name="Tabela20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2" style:family="table-row">
      <style:table-row-properties fo:keep-together="auto"/>
    </style:style>
    <style:style style:name="Tabela20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3" style:family="table-row">
      <style:table-row-properties fo:keep-together="auto"/>
    </style:style>
    <style:style style:name="Tabela20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4" style:family="table-row">
      <style:table-row-properties fo:keep-together="auto"/>
    </style:style>
    <style:style style:name="Tabela20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5" style:family="table-row">
      <style:table-row-properties fo:keep-together="auto"/>
    </style:style>
    <style:style style:name="Tabela20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6" style:family="table-row">
      <style:table-row-properties fo:keep-together="auto"/>
    </style:style>
    <style:style style:name="Tabela20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.791cm" fo:margin-left="-1.381cm" fo:margin-top="0cm" fo:margin-bottom="0cm" table:align="left" style:writing-mode="page"/>
    </style:style>
    <style:style style:name="Tabela5.A" style:family="table-column">
      <style:table-column-properties style:column-width="2.378cm"/>
    </style:style>
    <style:style style:name="Tabela5.B" style:family="table-column">
      <style:table-column-properties style:column-width="7.717cm"/>
    </style:style>
    <style:style style:name="Tabela5.C" style:family="table-column">
      <style:table-column-properties style:column-width="7.696cm"/>
    </style:style>
    <style:style style:name="Tabela5.1" style:family="table-row">
      <style:table-row-properties style:min-row-height="0.619cm" fo:keep-together="auto"/>
    </style:style>
    <style:style style:name="Tabela5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5.2" style:family="table-row">
      <style:table-row-properties fo:keep-together="auto"/>
    </style:style>
    <style:style style:name="Tabela5.A2" style:family="table-cell">
      <style:table-cell-properties style:vertical-align="middle" fo:padding="0cm" fo:border="0.25pt solid #000000"/>
    </style:style>
    <style:style style:name="Tabela5.B2" style:family="table-cell">
      <style:table-cell-properties style:vertical-align="middle" fo:padding="0cm" fo:border="0.25pt solid #000000"/>
    </style:style>
    <style:style style:name="Tabela5.C2" style:family="table-cell">
      <style:table-cell-properties style:vertical-align="middle" fo:padding="0cm" fo:border="0.25pt solid #000000"/>
    </style:style>
    <style:style style:name="Tabela5.3" style:family="table-row">
      <style:table-row-properties style:min-row-height="0.672cm" fo:keep-together="auto"/>
    </style:style>
    <style:style style:name="Tabela5.A3" style:family="table-cell">
      <style:table-cell-properties style:vertical-align="middle" fo:padding="0cm" fo:border="0.25pt solid #000000"/>
    </style:style>
    <style:style style:name="Tabela9" style:family="table">
      <style:table-properties style:width="17.806cm" fo:margin-left="-1.413cm" fo:margin-top="0cm" fo:margin-bottom="0cm" table:align="left" style:writing-mode="page"/>
    </style:style>
    <style:style style:name="Tabela9.A" style:family="table-column">
      <style:table-column-properties style:column-width="2.408cm"/>
    </style:style>
    <style:style style:name="Tabela9.B" style:family="table-column">
      <style:table-column-properties style:column-width="7.726cm"/>
    </style:style>
    <style:style style:name="Tabela9.C" style:family="table-column">
      <style:table-column-properties style:column-width="7.673cm"/>
    </style:style>
    <style:style style:name="Tabela9.1" style:family="table-row">
      <style:table-row-properties style:min-row-height="0.619cm" fo:keep-together="auto"/>
    </style:style>
    <style:style style:name="Tabela9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9.2" style:family="table-row">
      <style:table-row-properties fo:keep-together="auto"/>
    </style:style>
    <style:style style:name="Tabela9.A2" style:family="table-cell">
      <style:table-cell-properties style:vertical-align="middle" fo:padding="0cm" fo:border="0.25pt solid #000000"/>
    </style:style>
    <style:style style:name="Tabela9.B2" style:family="table-cell">
      <style:table-cell-properties style:vertical-align="middle" fo:padding="0cm" fo:border="0.25pt solid #000000"/>
    </style:style>
    <style:style style:name="Tabela9.C2" style:family="table-cell">
      <style:table-cell-properties style:vertical-align="middle" fo:padding="0cm" fo:border="0.25pt solid #000000"/>
    </style:style>
    <style:style style:name="Tabela9.3" style:family="table-row">
      <style:table-row-properties fo:keep-together="auto"/>
    </style:style>
    <style:style style:name="Tabela9.A3" style:family="table-cell">
      <style:table-cell-properties style:vertical-align="middle" fo:padding="0cm" fo:border="0.25pt solid #000000"/>
    </style:style>
    <style:style style:name="Tabela10" style:family="table">
      <style:table-properties style:width="17.791cm" fo:margin-left="-1.381cm" fo:margin-top="0cm" fo:margin-bottom="0cm" table:align="left" style:writing-mode="page"/>
    </style:style>
    <style:style style:name="Tabela10.A" style:family="table-column">
      <style:table-column-properties style:column-width="2.378cm"/>
    </style:style>
    <style:style style:name="Tabela10.B" style:family="table-column">
      <style:table-column-properties style:column-width="7.717cm"/>
    </style:style>
    <style:style style:name="Tabela10.C" style:family="table-column">
      <style:table-column-properties style:column-width="7.696cm"/>
    </style:style>
    <style:style style:name="Tabela10.1" style:family="table-row">
      <style:table-row-properties style:min-row-height="0.619cm" fo:keep-together="auto"/>
    </style:style>
    <style:style style:name="Tabela10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0.2" style:family="table-row">
      <style:table-row-properties style:min-row-height="0.774cm" fo:keep-together="auto"/>
    </style:style>
    <style:style style:name="Tabela10.A2" style:family="table-cell">
      <style:table-cell-properties style:vertical-align="middle" fo:padding="0cm" fo:border="0.25pt solid #000000"/>
    </style:style>
    <style:style style:name="Tabela10.B2" style:family="table-cell">
      <style:table-cell-properties style:vertical-align="middle" fo:padding="0cm" fo:border="0.25pt solid #000000"/>
    </style:style>
    <style:style style:name="Tabela10.C2" style:family="table-cell">
      <style:table-cell-properties style:vertical-align="middle" fo:padding="0cm" fo:border="0.25pt solid #000000"/>
    </style:style>
    <style:style style:name="Tabela10.3" style:family="table-row">
      <style:table-row-properties fo:keep-together="auto"/>
    </style:style>
    <style:style style:name="Tabela10.A3" style:family="table-cell">
      <style:table-cell-properties style:vertical-align="middle" fo:padding="0cm" fo:border="0.25pt solid #000000"/>
    </style:style>
    <style:style style:name="Tabela11" style:family="table">
      <style:table-properties style:width="17.791cm" fo:margin-left="-1.381cm" fo:margin-top="0cm" fo:margin-bottom="0cm" table:align="left" style:writing-mode="page"/>
    </style:style>
    <style:style style:name="Tabela11.A" style:family="table-column">
      <style:table-column-properties style:column-width="2.378cm"/>
    </style:style>
    <style:style style:name="Tabela11.B" style:family="table-column">
      <style:table-column-properties style:column-width="7.717cm"/>
    </style:style>
    <style:style style:name="Tabela11.C" style:family="table-column">
      <style:table-column-properties style:column-width="7.696cm"/>
    </style:style>
    <style:style style:name="Tabela11.1" style:family="table-row">
      <style:table-row-properties style:min-row-height="0.619cm" fo:keep-together="auto"/>
    </style:style>
    <style:style style:name="Tabela11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1.2" style:family="table-row">
      <style:table-row-properties fo:keep-together="auto"/>
    </style:style>
    <style:style style:name="Tabela11.A2" style:family="table-cell">
      <style:table-cell-properties style:vertical-align="middle" fo:padding="0cm" fo:border="0.25pt solid #000000"/>
    </style:style>
    <style:style style:name="Tabela11.B2" style:family="table-cell">
      <style:table-cell-properties style:vertical-align="middle" fo:padding="0cm" fo:border="0.25pt solid #000000"/>
    </style:style>
    <style:style style:name="Tabela11.C2" style:family="table-cell">
      <style:table-cell-properties style:vertical-align="middle" fo:padding="0cm" fo:border="0.25pt solid #000000"/>
    </style:style>
    <style:style style:name="Tabela11.3" style:family="table-row">
      <style:table-row-properties fo:keep-together="auto"/>
    </style:style>
    <style:style style:name="Tabela11.A3" style:family="table-cell">
      <style:table-cell-properties style:vertical-align="middle" fo:padding="0cm" fo:border="0.25pt solid #000000"/>
    </style:style>
    <style:style style:name="Tabela6" style:family="table">
      <style:table-properties style:width="17.791cm" fo:margin-left="-1.381cm" fo:margin-top="0cm" fo:margin-bottom="0cm" table:align="left" style:writing-mode="page"/>
    </style:style>
    <style:style style:name="Tabela6.A" style:family="table-column">
      <style:table-column-properties style:column-width="2.378cm"/>
    </style:style>
    <style:style style:name="Tabela6.B" style:family="table-column">
      <style:table-column-properties style:column-width="7.717cm"/>
    </style:style>
    <style:style style:name="Tabela6.C" style:family="table-column">
      <style:table-column-properties style:column-width="4.35cm"/>
    </style:style>
    <style:style style:name="Tabela6.D" style:family="table-column">
      <style:table-column-properties style:column-width="3.346cm"/>
    </style:style>
    <style:style style:name="Tabela6.1" style:family="table-row">
      <style:table-row-properties style:min-row-height="0.619cm" fo:keep-together="auto"/>
    </style:style>
    <style:style style:name="Tabela6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6.2" style:family="table-row">
      <style:table-row-properties style:min-row-height="1.171cm" fo:keep-together="auto"/>
    </style:style>
    <style:style style:name="Tabela6.A2" style:family="table-cell">
      <style:table-cell-properties style:vertical-align="middle" fo:padding="0cm" fo:border="0.25pt solid #000000"/>
    </style:style>
    <style:style style:name="Tabela6.B2" style:family="table-cell">
      <style:table-cell-properties style:vertical-align="middle" fo:padding="0cm" fo:border="0.25pt solid #000000"/>
    </style:style>
    <style:style style:name="Tabela6.C2" style:family="table-cell">
      <style:table-cell-properties style:vertical-align="middle" fo:padding="0cm" fo:border="0.25pt solid #000000"/>
    </style:style>
    <style:style style:name="Tabela6.D2" style:family="table-cell">
      <style:table-cell-properties style:vertical-align="middle" fo:padding="0cm" fo:border="0.25pt solid #000000"/>
    </style:style>
    <style:style style:name="Tabela6.3" style:family="table-row">
      <style:table-row-properties fo:keep-together="auto"/>
    </style:style>
    <style:style style:name="Tabela6.A3" style:family="table-cell">
      <style:table-cell-properties style:vertical-align="middle" fo:padding="0cm" fo:border="0.25pt solid #000000"/>
    </style:style>
    <style:style style:name="Tabela12" style:family="table">
      <style:table-properties style:width="17.791cm" fo:margin-left="-1.381cm" fo:margin-top="0cm" fo:margin-bottom="0cm" table:align="left" style:writing-mode="page"/>
    </style:style>
    <style:style style:name="Tabela12.A" style:family="table-column">
      <style:table-column-properties style:column-width="2.378cm"/>
    </style:style>
    <style:style style:name="Tabela12.B" style:family="table-column">
      <style:table-column-properties style:column-width="7.717cm"/>
    </style:style>
    <style:style style:name="Tabela12.C" style:family="table-column">
      <style:table-column-properties style:column-width="4.35cm"/>
    </style:style>
    <style:style style:name="Tabela12.D" style:family="table-column">
      <style:table-column-properties style:column-width="3.346cm"/>
    </style:style>
    <style:style style:name="Tabela12.1" style:family="table-row">
      <style:table-row-properties style:min-row-height="0.619cm" fo:keep-together="auto"/>
    </style:style>
    <style:style style:name="Tabela12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2.2" style:family="table-row">
      <style:table-row-properties fo:keep-together="auto"/>
    </style:style>
    <style:style style:name="Tabela12.A2" style:family="table-cell">
      <style:table-cell-properties style:vertical-align="middle" fo:padding="0cm" fo:border="0.25pt solid #000000"/>
    </style:style>
    <style:style style:name="Tabela12.B2" style:family="table-cell">
      <style:table-cell-properties style:vertical-align="middle" fo:padding="0cm" fo:border="0.25pt solid #000000"/>
    </style:style>
    <style:style style:name="Tabela12.C2" style:family="table-cell">
      <style:table-cell-properties style:vertical-align="middle" fo:padding="0cm" fo:border="0.25pt solid #000000"/>
    </style:style>
    <style:style style:name="Tabela12.D2" style:family="table-cell">
      <style:table-cell-properties style:vertical-align="middle" fo:padding="0cm" fo:border="0.25pt solid #000000"/>
    </style:style>
    <style:style style:name="Tabela12.3" style:family="table-row">
      <style:table-row-properties fo:keep-together="auto"/>
    </style:style>
    <style:style style:name="Tabela12.A3" style:family="table-cell">
      <style:table-cell-properties style:vertical-align="middle" fo:padding="0cm" fo:border="0.25pt solid #000000"/>
    </style:style>
    <style:style style:name="Tabela13" style:family="table">
      <style:table-properties style:width="17.791cm" fo:margin-left="-1.381cm" fo:margin-top="0cm" fo:margin-bottom="0cm" table:align="left" style:writing-mode="page"/>
    </style:style>
    <style:style style:name="Tabela13.A" style:family="table-column">
      <style:table-column-properties style:column-width="2.378cm"/>
    </style:style>
    <style:style style:name="Tabela13.B" style:family="table-column">
      <style:table-column-properties style:column-width="7.717cm"/>
    </style:style>
    <style:style style:name="Tabela13.C" style:family="table-column">
      <style:table-column-properties style:column-width="4.35cm"/>
    </style:style>
    <style:style style:name="Tabela13.D" style:family="table-column">
      <style:table-column-properties style:column-width="3.346cm"/>
    </style:style>
    <style:style style:name="Tabela13.1" style:family="table-row">
      <style:table-row-properties style:min-row-height="0.619cm" fo:keep-together="auto"/>
    </style:style>
    <style:style style:name="Tabela13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3.2" style:family="table-row">
      <style:table-row-properties fo:keep-together="auto"/>
    </style:style>
    <style:style style:name="Tabela13.A2" style:family="table-cell">
      <style:table-cell-properties style:vertical-align="middle" fo:padding="0cm" fo:border="0.25pt solid #000000"/>
    </style:style>
    <style:style style:name="Tabela13.B2" style:family="table-cell">
      <style:table-cell-properties style:vertical-align="middle" fo:padding="0cm" fo:border="0.25pt solid #000000"/>
    </style:style>
    <style:style style:name="Tabela13.C2" style:family="table-cell">
      <style:table-cell-properties style:vertical-align="middle" fo:padding="0cm" fo:border="0.25pt solid #000000"/>
    </style:style>
    <style:style style:name="Tabela13.D2" style:family="table-cell">
      <style:table-cell-properties style:vertical-align="middle" fo:padding="0cm" fo:border="0.25pt solid #000000"/>
    </style:style>
    <style:style style:name="Tabela13.3" style:family="table-row">
      <style:table-row-properties fo:keep-together="auto"/>
    </style:style>
    <style:style style:name="Tabela13.A3" style:family="table-cell">
      <style:table-cell-properties style:vertical-align="middle" fo:padding="0cm" fo:border="0.25pt solid #000000"/>
    </style:style>
    <style:style style:name="Tabela14" style:family="table">
      <style:table-properties style:width="17.791cm" fo:margin-left="-1.381cm" fo:margin-top="0cm" fo:margin-bottom="0cm" table:align="left" style:writing-mode="page"/>
    </style:style>
    <style:style style:name="Tabela14.A" style:family="table-column">
      <style:table-column-properties style:column-width="2.378cm"/>
    </style:style>
    <style:style style:name="Tabela14.B" style:family="table-column">
      <style:table-column-properties style:column-width="7.717cm"/>
    </style:style>
    <style:style style:name="Tabela14.C" style:family="table-column">
      <style:table-column-properties style:column-width="4.35cm"/>
    </style:style>
    <style:style style:name="Tabela14.D" style:family="table-column">
      <style:table-column-properties style:column-width="3.346cm"/>
    </style:style>
    <style:style style:name="Tabela14.1" style:family="table-row">
      <style:table-row-properties style:min-row-height="0.619cm" fo:keep-together="auto"/>
    </style:style>
    <style:style style:name="Tabela14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4.2" style:family="table-row">
      <style:table-row-properties fo:keep-together="auto"/>
    </style:style>
    <style:style style:name="Tabela14.A2" style:family="table-cell">
      <style:table-cell-properties style:vertical-align="middle" fo:padding="0cm" fo:border="0.25pt solid #000000"/>
    </style:style>
    <style:style style:name="Tabela14.B2" style:family="table-cell">
      <style:table-cell-properties style:vertical-align="middle" fo:padding="0cm" fo:border="0.25pt solid #000000"/>
    </style:style>
    <style:style style:name="Tabela14.C2" style:family="table-cell">
      <style:table-cell-properties style:vertical-align="middle" fo:padding="0cm" fo:border="0.25pt solid #000000"/>
    </style:style>
    <style:style style:name="Tabela14.D2" style:family="table-cell">
      <style:table-cell-properties style:vertical-align="middle" fo:padding="0cm" fo:border="0.25pt solid #000000"/>
    </style:style>
    <style:style style:name="Tabela14.3" style:family="table-row">
      <style:table-row-properties style:min-row-height="0.78cm" fo:keep-together="auto"/>
    </style:style>
    <style:style style:name="Tabela14.A3" style:family="table-cell">
      <style:table-cell-properties style:vertical-align="middle" fo:padding="0cm" fo:border="0.25pt solid #000000"/>
    </style:style>
    <style:style style:name="Tabela15" style:family="table">
      <style:table-properties style:width="17.791cm" fo:margin-left="-1.381cm" fo:margin-top="0cm" fo:margin-bottom="0cm" table:align="left" style:writing-mode="page"/>
    </style:style>
    <style:style style:name="Tabela15.A" style:family="table-column">
      <style:table-column-properties style:column-width="2.378cm"/>
    </style:style>
    <style:style style:name="Tabela15.B" style:family="table-column">
      <style:table-column-properties style:column-width="7.717cm"/>
    </style:style>
    <style:style style:name="Tabela15.C" style:family="table-column">
      <style:table-column-properties style:column-width="4.35cm"/>
    </style:style>
    <style:style style:name="Tabela15.D" style:family="table-column">
      <style:table-column-properties style:column-width="3.346cm"/>
    </style:style>
    <style:style style:name="Tabela15.1" style:family="table-row">
      <style:table-row-properties style:min-row-height="0.619cm" fo:keep-together="auto"/>
    </style:style>
    <style:style style:name="Tabela15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5.2" style:family="table-row">
      <style:table-row-properties fo:keep-together="auto"/>
    </style:style>
    <style:style style:name="Tabela15.A2" style:family="table-cell">
      <style:table-cell-properties style:vertical-align="middle" fo:padding="0cm" fo:border="0.25pt solid #000000"/>
    </style:style>
    <style:style style:name="Tabela15.B2" style:family="table-cell">
      <style:table-cell-properties style:vertical-align="middle" fo:padding="0cm" fo:border="0.25pt solid #000000"/>
    </style:style>
    <style:style style:name="Tabela15.C2" style:family="table-cell">
      <style:table-cell-properties style:vertical-align="middle" fo:padding="0cm" fo:border="0.25pt solid #000000"/>
    </style:style>
    <style:style style:name="Tabela15.D2" style:family="table-cell">
      <style:table-cell-properties style:vertical-align="middle" fo:padding="0cm" fo:border="0.25pt solid #000000"/>
    </style:style>
    <style:style style:name="Tabela15.3" style:family="table-row">
      <style:table-row-properties fo:keep-together="auto"/>
    </style:style>
    <style:style style:name="Tabela15.A3" style:family="table-cell">
      <style:table-cell-properties style:vertical-align="middle" fo:padding="0cm" fo:border="0.25pt solid #000000"/>
    </style:style>
    <style:style style:name="Tabela16" style:family="table">
      <style:table-properties style:width="17.791cm" fo:margin-left="-1.381cm" fo:margin-top="0cm" fo:margin-bottom="0cm" table:align="left" style:writing-mode="page"/>
    </style:style>
    <style:style style:name="Tabela16.A" style:family="table-column">
      <style:table-column-properties style:column-width="2.378cm"/>
    </style:style>
    <style:style style:name="Tabela16.B" style:family="table-column">
      <style:table-column-properties style:column-width="7.717cm"/>
    </style:style>
    <style:style style:name="Tabela16.C" style:family="table-column">
      <style:table-column-properties style:column-width="4.35cm"/>
    </style:style>
    <style:style style:name="Tabela16.D" style:family="table-column">
      <style:table-column-properties style:column-width="3.346cm"/>
    </style:style>
    <style:style style:name="Tabela16.1" style:family="table-row">
      <style:table-row-properties style:min-row-height="0.619cm" fo:keep-together="auto"/>
    </style:style>
    <style:style style:name="Tabela16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6.2" style:family="table-row">
      <style:table-row-properties fo:keep-together="auto"/>
    </style:style>
    <style:style style:name="Tabela16.A2" style:family="table-cell">
      <style:table-cell-properties style:vertical-align="middle" fo:padding="0cm" fo:border="0.25pt solid #000000"/>
    </style:style>
    <style:style style:name="Tabela16.B2" style:family="table-cell">
      <style:table-cell-properties style:vertical-align="middle" fo:padding="0cm" fo:border="0.25pt solid #000000"/>
    </style:style>
    <style:style style:name="Tabela16.C2" style:family="table-cell">
      <style:table-cell-properties style:vertical-align="middle" fo:padding="0cm" fo:border="0.25pt solid #000000"/>
    </style:style>
    <style:style style:name="Tabela16.D2" style:family="table-cell">
      <style:table-cell-properties style:vertical-align="middle" fo:padding="0cm" fo:border="0.25pt solid #000000"/>
    </style:style>
    <style:style style:name="Tabela16.3" style:family="table-row">
      <style:table-row-properties style:min-row-height="0.61cm" fo:keep-together="auto"/>
    </style:style>
    <style:style style:name="Tabela16.A3" style:family="table-cell">
      <style:table-cell-properties style:vertical-align="middle" fo:padding="0cm" fo:border="0.25pt solid #000000"/>
    </style:style>
    <style:style style:name="Tabela7" style:family="table">
      <style:table-properties style:width="17.791cm" fo:margin-left="-1.381cm" fo:margin-top="0cm" fo:margin-bottom="0cm" table:align="left" style:writing-mode="page"/>
    </style:style>
    <style:style style:name="Tabela7.A" style:family="table-column">
      <style:table-column-properties style:column-width="2.378cm"/>
    </style:style>
    <style:style style:name="Tabela7.B" style:family="table-column">
      <style:table-column-properties style:column-width="7.717cm"/>
    </style:style>
    <style:style style:name="Tabela7.C" style:family="table-column">
      <style:table-column-properties style:column-width="4.35cm"/>
    </style:style>
    <style:style style:name="Tabela7.D" style:family="table-column">
      <style:table-column-properties style:column-width="3.346cm"/>
    </style:style>
    <style:style style:name="Tabela7.1" style:family="table-row">
      <style:table-row-properties style:min-row-height="0.619cm" fo:keep-together="auto"/>
    </style:style>
    <style:style style:name="Tabela7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7.2" style:family="table-row">
      <style:table-row-properties fo:keep-together="auto"/>
    </style:style>
    <style:style style:name="Tabela7.A2" style:family="table-cell">
      <style:table-cell-properties style:vertical-align="middle" fo:padding="0cm" fo:border="0.25pt solid #000000"/>
    </style:style>
    <style:style style:name="Tabela7.B2" style:family="table-cell">
      <style:table-cell-properties style:vertical-align="middle" fo:padding="0cm" fo:border="0.25pt solid #000000"/>
    </style:style>
    <style:style style:name="Tabela7.C2" style:family="table-cell">
      <style:table-cell-properties style:vertical-align="middle" fo:padding="0cm" fo:border="0.25pt solid #000000"/>
    </style:style>
    <style:style style:name="Tabela7.D2" style:family="table-cell">
      <style:table-cell-properties style:vertical-align="middle" fo:padding="0cm" fo:border="0.25pt solid #000000"/>
    </style:style>
    <style:style style:name="Tabela7.3" style:family="table-row">
      <style:table-row-properties style:min-row-height="0.61cm" fo:keep-together="auto"/>
    </style:style>
    <style:style style:name="Tabela7.A3" style:family="table-cell">
      <style:table-cell-properties style:vertical-align="middle" fo:padding="0cm" fo:border="0.25pt solid #000000"/>
    </style:style>
    <style:style style:name="Tabela17" style:family="table">
      <style:table-properties style:width="17.791cm" fo:margin-left="-1.381cm" fo:margin-top="0cm" fo:margin-bottom="0cm" table:align="left" style:writing-mode="page"/>
    </style:style>
    <style:style style:name="Tabela17.A" style:family="table-column">
      <style:table-column-properties style:column-width="2.378cm"/>
    </style:style>
    <style:style style:name="Tabela17.B" style:family="table-column">
      <style:table-column-properties style:column-width="7.717cm"/>
    </style:style>
    <style:style style:name="Tabela17.C" style:family="table-column">
      <style:table-column-properties style:column-width="4.35cm"/>
    </style:style>
    <style:style style:name="Tabela17.D" style:family="table-column">
      <style:table-column-properties style:column-width="3.346cm"/>
    </style:style>
    <style:style style:name="Tabela17.1" style:family="table-row">
      <style:table-row-properties style:min-row-height="0.619cm" fo:keep-together="auto"/>
    </style:style>
    <style:style style:name="Tabela17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7.2" style:family="table-row">
      <style:table-row-properties fo:keep-together="auto"/>
    </style:style>
    <style:style style:name="Tabela17.A2" style:family="table-cell">
      <style:table-cell-properties style:vertical-align="middle" fo:padding="0cm" fo:border="0.25pt solid #000000"/>
    </style:style>
    <style:style style:name="Tabela17.B2" style:family="table-cell">
      <style:table-cell-properties style:vertical-align="middle" fo:padding="0cm" fo:border="0.25pt solid #000000"/>
    </style:style>
    <style:style style:name="Tabela17.C2" style:family="table-cell">
      <style:table-cell-properties style:vertical-align="middle" fo:padding="0cm" fo:border="0.25pt solid #000000"/>
    </style:style>
    <style:style style:name="Tabela17.D2" style:family="table-cell">
      <style:table-cell-properties style:vertical-align="middle" fo:padding="0cm" fo:border="0.25pt solid #000000"/>
    </style:style>
    <style:style style:name="Tabela17.3" style:family="table-row">
      <style:table-row-properties fo:keep-together="auto"/>
    </style:style>
    <style:style style:name="Tabela17.A3" style:family="table-cell">
      <style:table-cell-properties style:vertical-align="middle" fo:padding="0cm" fo:border="0.25pt solid #000000"/>
    </style:style>
    <style:style style:name="Tabela18" style:family="table">
      <style:table-properties style:width="17.791cm" fo:margin-left="-1.381cm" fo:margin-top="0cm" fo:margin-bottom="0cm" table:align="left" style:writing-mode="page"/>
    </style:style>
    <style:style style:name="Tabela18.A" style:family="table-column">
      <style:table-column-properties style:column-width="2.378cm"/>
    </style:style>
    <style:style style:name="Tabela18.B" style:family="table-column">
      <style:table-column-properties style:column-width="7.717cm"/>
    </style:style>
    <style:style style:name="Tabela18.C" style:family="table-column">
      <style:table-column-properties style:column-width="4.35cm"/>
    </style:style>
    <style:style style:name="Tabela18.D" style:family="table-column">
      <style:table-column-properties style:column-width="3.346cm"/>
    </style:style>
    <style:style style:name="Tabela18.1" style:family="table-row">
      <style:table-row-properties style:min-row-height="0.619cm" fo:keep-together="auto"/>
    </style:style>
    <style:style style:name="Tabela18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8.2" style:family="table-row">
      <style:table-row-properties fo:keep-together="auto"/>
    </style:style>
    <style:style style:name="Tabela18.A2" style:family="table-cell">
      <style:table-cell-properties style:vertical-align="middle" fo:padding="0cm" fo:border="0.25pt solid #000000"/>
    </style:style>
    <style:style style:name="Tabela18.B2" style:family="table-cell">
      <style:table-cell-properties style:vertical-align="middle" fo:padding="0cm" fo:border="0.25pt solid #000000"/>
    </style:style>
    <style:style style:name="Tabela18.C2" style:family="table-cell">
      <style:table-cell-properties style:vertical-align="middle" fo:padding="0cm" fo:border="0.25pt solid #000000"/>
    </style:style>
    <style:style style:name="Tabela18.D2" style:family="table-cell">
      <style:table-cell-properties style:vertical-align="middle" fo:padding="0cm" fo:border="0.25pt solid #000000"/>
    </style:style>
    <style:style style:name="Tabela18.3" style:family="table-row">
      <style:table-row-properties style:min-row-height="0.716cm" fo:keep-together="auto"/>
    </style:style>
    <style:style style:name="Tabela18.A3" style:family="table-cell">
      <style:table-cell-properties style:vertical-align="middle" fo:padding="0cm" fo:border="0.25pt solid #000000"/>
    </style:style>
    <style:style style:name="P1" style:family="paragraph" style:parent-style-name="Contents_20_1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4" style:family="paragraph" style:parent-style-name="Footer" style:list-style-name="WWNum1">
      <style:paragraph-properties fo:margin-left="0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rame_20_contents" style:list-style-name="WWNum1">
      <style:paragraph-properties fo:margin-left="0cm" fo:margin-top="0cm" fo:margin-bottom="0cm" style:contextual-spacing="false" fo:line-height="100%" fo:text-indent="0cm" style:auto-text-indent="false">
        <style:tab-stops/>
      </style:paragraph-properties>
    </style:style>
    <style:style style:name="P6" style:family="paragraph" style:parent-style-name="Header" style:list-style-name="WWNum1" style:master-page-name="">
      <loext:graphic-properties draw:fill="none"/>
      <style:paragraph-properties fo:margin-left="-1.101cm" fo:margin-right="-0.80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14.901cm" style:type="right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list-style-name="">
      <style:paragraph-properties fo:text-align="center" style:justify-single-word="false"/>
    </style:style>
    <style:style style:name="P10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11" style:family="paragraph" style:parent-style-name="Heading_20_2" style:list-style-name="WWNum1" style:master-page-name="">
      <loext:graphic-properties draw:fill="none"/>
      <style:paragraph-properties fo:margin-left="0.101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12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a732f1"/>
    </style:style>
    <style:style style:name="P13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7fab52"/>
    </style:style>
    <style:style style:name="P14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>
        <style:tab-stops>
          <style:tab-stop style:position="0.794cm"/>
        </style:tab-stops>
      </style:paragraph-properties>
    </style:style>
    <style:style style:name="P15" style:family="paragraph" style:parent-style-name="Heading_20_2" style:list-style-name=""/>
    <style:style style:name="P16" style:family="paragraph" style:parent-style-name="Heading_20_2">
      <style:text-properties officeooo:paragraph-rsid="0080e106"/>
    </style:style>
    <style:style style:name="P17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style:font-name="Arial1" officeooo:paragraph-rsid="00656a96"/>
    </style:style>
    <style:style style:name="P18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style:font-name="Arial1"/>
    </style:style>
    <style:style style:name="P19" style:family="paragraph" style:parent-style-name="Heading_20_3" style:list-style-name=""/>
    <style:style style:name="P20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21" style:family="paragraph" style:parent-style-name="Heading_20_3" style:list-style-name="WWNum1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22" style:family="paragraph" style:parent-style-name="Heading_20_4" style:list-style-name="WWNum1">
      <style:text-properties fo:font-style="normal" style:font-style-asian="normal" style:font-style-complex="normal"/>
    </style:style>
    <style:style style:name="P23" style:family="paragraph" style:parent-style-name="Heading_20_4">
      <style:text-properties fo:font-style="normal" style:font-style-asian="normal" style:font-style-complex="normal"/>
    </style:style>
    <style:style style:name="P24" style:family="paragraph" style:parent-style-name="Heading_20_4">
      <style:text-properties fo:font-weight="normal" style:font-weight-asian="normal" style:font-weight-complex="normal"/>
    </style:style>
    <style:style style:name="P25" style:family="paragraph" style:parent-style-name="PI_20_SEÇÃO_20_01" style:list-style-name=""/>
    <style:style style:name="P26" style:family="paragraph" style:parent-style-name="PI_20_SEÇÃO_20_01" style:list-style-name="">
      <style:paragraph-properties fo:margin-top="0.494cm" fo:margin-bottom="0.494cm" style:contextual-spacing="false" fo:text-indent="0cm" style:auto-text-indent="false"/>
    </style:style>
    <style:style style:name="P27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</style:style>
    <style:style style:name="P28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  <style:text-properties officeooo:paragraph-rsid="00656a96"/>
    </style:style>
    <style:style style:name="P29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  <style:text-properties fo:color="#ee0000" loext:opacity="100%" style:font-name="Arial1" fo:font-size="12pt" fo:font-style="italic" style:font-size-asian="12pt" style:font-style-asian="italic" style:font-name-complex="Arial2" style:font-size-complex="12pt" style:font-style-complex="italic" style:font-weight-complex="bold"/>
    </style:style>
    <style:style style:name="P30" style:family="paragraph" style:parent-style-name="PI_20_SEÇÃO_20_2" style:list-style-name="">
      <style:paragraph-properties fo:margin-left="0cm" fo:margin-top="0.494cm" fo:margin-bottom="0.494cm" style:contextual-spacing="false" fo:text-align="justify" style:justify-single-word="false" fo:text-indent="0cm" style:auto-text-indent="false"/>
    </style:style>
    <style:style style:name="P31" style:family="paragraph" style:parent-style-name="PI_20_SEÇÃO_20_2" style:list-style-name="">
      <style:paragraph-properties fo:margin-top="0.494cm" fo:margin-bottom="0.494cm" style:contextual-spacing="false" fo:line-height="150%" fo:text-indent="0cm" style:auto-text-indent="false"/>
      <style:text-properties fo:color="#000000" loext:opacity="100%" fo:font-weight="normal" style:font-weight-asian="normal" style:font-weight-complex="normal"/>
    </style:style>
    <style:style style:name="P32" style:family="paragraph" style:parent-style-name="PI_20_SEÇÃO_20_2" style:list-style-name="">
      <style:paragraph-properties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3" style:family="paragraph" style:parent-style-name="PI_20_SEÇÃO_20_2" style:list-style-name="">
      <style:paragraph-properties fo:margin-left="0cm"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4" style:family="paragraph" style:parent-style-name="PI_20_SEÇÃO_20_2" style:list-style-name="">
      <style:paragraph-properties fo:margin-left="0cm"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61c8bc" style:font-weight-asian="bold" style:font-weight-complex="bold"/>
    </style:style>
    <style:style style:name="P35" style:family="paragraph" style:parent-style-name="PI_20_SEÇÃO_20_2" style:list-style-name="">
      <style:paragraph-properties fo:margin-left="0cm" fo:margin-top="0.494cm" fo:margin-bottom="0.494cm" style:contextual-spacing="false" fo:line-height="150%" fo:text-align="center" style:justify-single-word="false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6" style:family="paragraph" style:parent-style-name="PI_20_TÍTULO_20_01" style:list-style-name=""/>
    <style:style style:name="P37" style:family="paragraph" style:parent-style-name="PI_20_TÍTULO_20_01" style:list-style-name="">
      <style:paragraph-properties fo:margin-left="0cm" fo:margin-top="0.212cm" fo:margin-bottom="0.212cm" style:contextual-spacing="false" fo:text-indent="0cm" style:auto-text-indent="false"/>
    </style:style>
    <style:style style:name="P38" style:family="paragraph" style:parent-style-name="PI_20_TÍTULO_20_01" style:list-style-name="">
      <style:paragraph-properties fo:margin-top="0.212cm" fo:margin-bottom="0.212cm" style:contextual-spacing="false" fo:text-indent="0cm" style:auto-text-indent="false"/>
    </style:style>
    <style:style style:name="P39" style:family="paragraph" style:parent-style-name="PI_20_TÍTULO_20_01" style:list-style-name="">
      <style:paragraph-properties fo:margin-left="0cm" fo:margin-top="0.212cm" fo:margin-bottom="0.212cm" style:contextual-spacing="false" fo:text-indent="0cm" style:auto-text-indent="false"/>
      <style:text-properties officeooo:paragraph-rsid="0066ac44"/>
    </style:style>
    <style:style style:name="P40" style:family="paragraph" style:parent-style-name="PI_20_TÍTULO_20_01" style:list-style-name="">
      <style:paragraph-properties fo:margin-top="0.212cm" fo:margin-bottom="0.212cm" style:contextual-spacing="false" fo:text-indent="0cm" style:auto-text-indent="false"/>
      <style:text-properties officeooo:paragraph-rsid="0066ac44"/>
    </style:style>
    <style:style style:name="P41" style:family="paragraph" style:parent-style-name="PI_20_TÍTULO_20_01" style:list-style-name="">
      <loext:graphic-properties draw:fill="none"/>
      <style:paragraph-properties fo:margin-left="0.199cm" fo:margin-right="0cm" fo:margin-top="0.212cm" fo:margin-bottom="0.212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tyle="italic" style:text-underline-style="solid" style:text-underline-width="auto" style:text-underline-color="font-color" officeooo:paragraph-rsid="0027ce30" style:font-style-asian="italic" style:font-style-complex="italic" style:font-weight-complex="bold"/>
    </style:style>
    <style:style style:name="P42" style:family="paragraph" style:parent-style-name="Parágrafo_20_da_20_Lista1">
      <style:paragraph-properties fo:line-height="150%" fo:text-align="center" style:justify-single-word="false"/>
    </style:style>
    <style:style style:name="P43" style:family="paragraph" style:parent-style-name="Standard" style:list-style-name=""/>
    <style:style style:name="P44" style:family="paragraph" style:parent-style-name="Standard" style:list-style-name="">
      <style:paragraph-properties fo:margin-left="0cm" fo:margin-top="0.494cm" fo:margin-bottom="0.494cm" style:contextual-spacing="false" fo:text-indent="0cm" style:auto-text-indent="false"/>
      <style:text-properties officeooo:paragraph-rsid="002a0eaf"/>
    </style:style>
    <style:style style:name="P45" style:family="paragraph" style:parent-style-name="Standard" style:list-style-name="">
      <style:text-properties officeooo:paragraph-rsid="002c7dbd"/>
    </style:style>
    <style:style style:name="P46" style:family="paragraph" style:parent-style-name="Standard" style:list-style-name="">
      <style:paragraph-properties fo:margin-left="0cm" fo:margin-top="0.494cm" fo:margin-bottom="0.494cm" style:contextual-spacing="false" fo:line-height="150%" fo:text-align="center" style:justify-single-word="false" fo:text-indent="0cm" style:auto-text-indent="false">
        <style:tab-stops/>
      </style:paragraph-properties>
      <style:text-properties officeooo:rsid="0034e570" officeooo:paragraph-rsid="0034e570"/>
    </style:style>
    <style:style style:name="P47" style:family="paragraph" style:parent-style-name="Standard" style:list-style-name="">
      <style:paragraph-properties fo:text-align="center" style:justify-single-word="false"/>
    </style:style>
    <style:style style:name="P48" style:family="paragraph" style:parent-style-name="Standard" style:list-style-name="">
      <style:paragraph-properties fo:margin-top="0.212cm" fo:margin-bottom="0.212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1" fo:font-size="12pt" fo:font-weight="bold" style:font-size-asian="12pt" style:font-weight-asian="bold" style:font-name-complex="Arial2" style:font-size-complex="12pt"/>
    </style:style>
    <style:style style:name="P49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style:font-name="Arial1" fo:font-size="12pt" fo:font-weight="bold" style:font-size-asian="12pt" style:font-weight-asian="bold" style:font-name-complex="Arial2" style:font-size-complex="12pt"/>
    </style:style>
    <style:style style:name="P50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style="normal" officeooo:rsid="001c13a9" officeooo:paragraph-rsid="001c13a9" style:font-size-asian="12pt" style:font-style-asian="normal" style:font-name-complex="Arial2" style:font-size-complex="12pt" style:font-style-complex="normal" style:font-weight-complex="bold"/>
    </style:style>
    <style:style style:name="P51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bold" style:font-size-asian="12pt" style:font-weight-asian="bold" style:font-name-complex="Arial2" style:font-size-complex="12pt"/>
    </style:style>
    <style:style style:name="P52" style:family="paragraph" style:parent-style-name="Standard" style:list-style-name="">
      <style:paragraph-properties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P53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/>
    </style:style>
    <style:style style:name="P54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style:letter-kerning="false" style:font-name-complex="Arial2" style:language-complex="ar" style:country-complex="SA" style:font-weight-complex="bold"/>
    </style:style>
    <style:style style:name="P55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officeooo:rsid="0032b302" officeooo:paragraph-rsid="0032b302" style:letter-kerning="false" style:language-complex="ar" style:country-complex="SA"/>
    </style:style>
    <style:style style:name="P56" style:family="paragraph" style:parent-style-name="Standard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officeooo:rsid="0032b302" officeooo:paragraph-rsid="00b874ef" style:letter-kerning="false" style:language-complex="ar" style:country-complex="SA"/>
    </style:style>
    <style:style style:name="P57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24c723" officeooo:paragraph-rsid="0024c723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58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3da92c" officeooo:paragraph-rsid="003da92c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59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2310d1" officeooo:paragraph-rsid="002310d1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0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32b302" officeooo:paragraph-rsid="0032b302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1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2" style:family="paragraph" style:parent-style-name="Standard">
      <style:paragraph-properties fo:margin-top="0.494cm" fo:margin-bottom="0.494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tyle="normal" style:text-underline-style="none" fo:font-weight="normal" officeooo:paragraph-rsid="0027ce30" style:font-style-asian="normal" style:font-weight-asian="normal" style:font-name-complex="Arial2" style:font-style-complex="normal"/>
    </style:style>
    <style:style style:name="P63" style:family="paragraph" style:parent-style-name="Standard">
      <style:paragraph-properties fo:margin-top="0.494cm" fo:margin-bottom="0.494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tyle="normal" style:text-underline-style="none" fo:font-weight="normal" officeooo:paragraph-rsid="00bbf85a" style:font-style-asian="normal" style:font-weight-asian="normal" style:font-name-complex="Arial2" style:font-style-complex="normal"/>
    </style:style>
    <style:style style:name="P64" style:family="paragraph" style:parent-style-name="Standard">
      <style:paragraph-properties fo:margin-lef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Arial1" fo:font-size="11pt" fo:font-style="normal" style:text-underline-style="none" fo:font-weight="normal" officeooo:rsid="006e36de" officeooo:paragraph-rsid="006e36de" style:font-size-asian="11pt" style:font-style-asian="normal" style:font-weight-asian="normal" style:font-name-complex="Arial2" style:font-size-complex="11pt" style:font-style-complex="normal"/>
    </style:style>
    <style:style style:name="P65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officeooo:rsid="0032b302" officeooo:paragraph-rsid="006e36de" style:letter-kerning="false" style:font-size-asian="11pt" style:font-size-complex="11pt" style:language-complex="ar" style:country-complex="SA"/>
    </style:style>
    <style:style style:name="P66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rsid="006e36de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67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68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69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fo:language="pt" fo:country="BR" fo:font-style="normal" fo:font-weight="normal" officeooo:rsid="002310d1" officeooo:paragraph-rsid="002310d1" style:letter-kerning="false" style:font-style-asian="normal" style:font-weight-asian="normal" style:language-complex="ar" style:country-complex="SA" style:font-style-complex="normal" style:font-weight-complex="normal"/>
    </style:style>
    <style:style style:name="P70" style:family="paragraph" style:parent-style-name="Standard" style:list-styl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1da3b2"/>
    </style:style>
    <style:style style:name="P71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e36de"/>
    </style:style>
    <style:style style:name="P72" style:family="paragraph" style:parent-style-name="Standard" style:list-styl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33625"/>
    </style:style>
    <style:style style:name="P73" style:family="paragraph" style:parent-style-name="Standard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74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5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officeooo:paragraph-rsid="006e36de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6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officeooo:rsid="006e36de" officeooo:paragraph-rsid="006e36de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7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style:font-name="Arial1" fo:font-size="12pt" fo:language="pt" fo:country="BR" fo:font-weight="bold" style:letter-kerning="false" style:font-size-asian="12pt" style:font-weight-asian="bold" style:font-name-complex="Arial2" style:font-size-complex="12pt" style:language-complex="ar" style:country-complex="SA" style:font-weight-complex="normal">
        <loext:char-complex-color loext:theme-type="light1" loext:color-type="theme"/>
      </style:text-properties>
    </style:style>
    <style:style style:name="P78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language="pt" fo:country="BR" fo:font-weight="bold" style:letter-kerning="false" style:font-weight-asian="bold" style:language-complex="ar" style:country-complex="SA" style:font-weight-complex="bold"/>
    </style:style>
    <style:style style:name="P79" style:family="paragraph" style:parent-style-name="Standard" style:list-style-name="WWNum1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language="pt" fo:country="BR" fo:font-weight="bold" officeooo:paragraph-rsid="0022655a" style:letter-kerning="false" style:font-weight-asian="bold" style:language-complex="ar" style:country-complex="SA" style:font-weight-complex="bold"/>
    </style:style>
    <style:style style:name="P80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language="pt" fo:country="BR" style:letter-kerning="false" style:language-complex="ar" style:country-complex="SA"/>
    </style:style>
    <style:style style:name="P81" style:family="paragraph" style:parent-style-name="Standard" style:list-style-name="">
      <style:paragraph-properties fo:margin-left="0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ee0000" loext:opacity="100%" style:font-name="Arial1" fo:font-style="italic" style:text-underline-style="solid" style:text-underline-width="auto" style:text-underline-color="font-color" style:font-style-asian="italic" style:font-name-complex="Arial2" style:font-style-complex="italic" style:font-weight-complex="bold"/>
    </style:style>
    <style:style style:name="P82" style:family="paragraph" style:parent-style-name="Standard" style:list-style-name="">
      <style:paragraph-properties fo:margin-left="0.194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ee0000" loext:opacity="100%" style:font-name="Arial1" fo:font-size="12pt" fo:font-style="italic" officeooo:paragraph-rsid="002c7dbd" style:font-size-asian="12pt" style:font-style-asian="italic" style:font-name-complex="Arial2" style:font-size-complex="12pt" style:font-style-complex="italic" style:font-weight-complex="bold"/>
    </style:style>
    <style:style style:name="P83" style:family="paragraph" style:parent-style-name="Standard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officeooo:paragraph-rsid="009deb7d"/>
    </style:style>
    <style:style style:name="P84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</style:style>
    <style:style style:name="P85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/>
    </style:style>
    <style:style style:name="P86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/>
    </style:style>
    <style:style style:name="P87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style:line-height-at-least="0.423cm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1c13a9" style:font-size-asian="12pt" style:font-style-asian="normal" style:font-weight-asian="normal" style:font-size-complex="12pt" style:font-style-complex="normal"/>
    </style:style>
    <style:style style:name="P89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1c13a9" style:font-size-asian="12pt" style:font-style-asian="normal" style:font-weight-asian="normal" style:font-size-complex="12pt" style:font-style-complex="normal"/>
    </style:style>
    <style:style style:name="P90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4f1834" style:font-size-asian="12pt" style:font-style-asian="normal" style:font-weight-asian="normal" style:font-size-complex="12pt" style:font-style-complex="normal"/>
    </style:style>
    <style:style style:name="P91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paragraph-rsid="004f183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1c13a9" officeooo:paragraph-rsid="004f183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9b5592" officeooo:paragraph-rsid="009b559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b81d1" officeooo:paragraph-rsid="00bb81d1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bb81d1" officeooo:paragraph-rsid="00bb81d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d99ff" officeooo:paragraph-rsid="00bd99ff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bd99ff" officeooo:paragraph-rsid="00bd99ff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e2ba8" officeooo:paragraph-rsid="00be2ba8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be2ba8" officeooo:paragraph-rsid="00be2ba8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/>
    </style:style>
    <style:style style:name="P104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/>
    </style:style>
    <style:style style:name="P105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/>
    </style:style>
    <style:style style:name="P106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/>
    </style:style>
    <style:style style:name="P107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9abef0" style:font-size-asian="12pt" style:font-style-asian="normal" style:font-weight-asian="normal" style:font-size-complex="12pt" style:font-style-complex="normal"/>
    </style:style>
    <style:style style:name="P108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bb81d1" style:font-size-asian="12pt" style:font-style-asian="normal" style:font-weight-asian="normal" style:font-size-complex="12pt" style:font-style-complex="normal"/>
    </style:style>
    <style:style style:name="P109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bd99ff" style:font-size-asian="12pt" style:font-style-asian="normal" style:font-weight-asian="normal" style:font-size-complex="12pt" style:font-style-complex="normal"/>
    </style:style>
    <style:style style:name="P110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be2ba8" style:font-size-asian="12pt" style:font-style-asian="normal" style:font-weight-asian="normal" style:font-size-complex="12pt" style:font-style-complex="normal"/>
    </style:style>
    <style:style style:name="P111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/>
    </style:style>
    <style:style style:name="P112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/>
    </style:style>
    <style:style style:name="P113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bb81d1" style:font-size-asian="12pt" style:font-style-asian="normal" style:font-weight-asian="normal" style:font-size-complex="12pt" style:font-style-complex="normal"/>
    </style:style>
    <style:style style:name="P114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b81d1" officeooo:paragraph-rsid="00bb81d1" style:font-size-asian="12pt" style:font-style-asian="normal" style:font-weight-asian="normal" style:font-size-complex="12pt" style:font-style-complex="normal"/>
    </style:style>
    <style:style style:name="P115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d99ff" officeooo:paragraph-rsid="00bd99ff" style:font-size-asian="12pt" style:font-style-asian="normal" style:font-weight-asian="normal" style:font-size-complex="12pt" style:font-style-complex="normal"/>
    </style:style>
    <style:style style:name="P116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d99ff" officeooo:paragraph-rsid="00bd99ff" style:font-size-asian="12pt" style:font-style-asian="normal" style:font-weight-asian="normal" style:font-size-complex="12pt" style:font-style-complex="normal"/>
    </style:style>
    <style:style style:name="P117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e2ba8" officeooo:paragraph-rsid="00be2ba8" style:font-size-asian="12pt" style:font-style-asian="normal" style:font-weight-asian="normal" style:font-size-complex="12pt" style:font-style-complex="normal"/>
    </style:style>
    <style:style style:name="P118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e2ba8" officeooo:paragraph-rsid="00be2ba8" style:font-size-asian="12pt" style:font-style-asian="normal" style:font-weight-asian="normal" style:font-size-complex="12pt" style:font-style-complex="normal"/>
    </style:style>
    <style:style style:name="P119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tyle="normal" style:font-style-asian="normal" style:font-style-complex="normal"/>
    </style:style>
    <style:style style:name="P120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tyle="normal" style:font-style-asian="normal" style:font-style-complex="normal"/>
    </style:style>
    <style:style style:name="P121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tyle="normal" officeooo:paragraph-rsid="002a36e8" style:font-style-asian="normal" style:font-style-complex="normal"/>
    </style:style>
    <style:style style:name="P122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tyle="normal" officeooo:paragraph-rsid="002a0eaf" style:font-style-asian="normal" style:font-style-complex="normal"/>
    </style:style>
    <style:style style:name="P123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tyle="normal" fo:font-weight="normal" officeooo:paragraph-rsid="002a36e8" style:font-style-asian="normal" style:font-weight-asian="normal" style:font-style-complex="normal" style:font-weight-complex="normal"/>
    </style:style>
    <style:style style:name="P124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normal" style:font-size-asian="11pt" style:font-style-asian="normal" style:font-weight-asian="normal" style:font-size-complex="11pt" style:font-style-complex="normal"/>
    </style:style>
    <style:style style:name="P125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0eaf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c7dbd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c7dbd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P131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tyle-complex="normal" style:font-weight-complex="normal"/>
    </style:style>
    <style:style style:name="P132" style:family="paragraph" style:parent-style-name="Tabela_20_1" style:list-style-name="">
      <style:paragraph-properties fo:margin-left="0cm" fo:margin-right="0.185cm" style:line-height-at-least="0.499cm" fo:text-align="center" style:justify-single-word="false" fo:text-indent="0cm" style:auto-text-indent="false">
        <style:tab-stops/>
      </style:paragraph-properties>
      <style:text-properties fo:color="#000000" loext:opacity="100%" fo:font-size="11pt" fo:font-style="normal" fo:font-weight="normal" style:font-size-asian="11pt" style:font-style-asian="normal" style:font-weight-asian="normal" style:font-style-complex="normal"/>
    </style:style>
    <style:style style:name="P133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tyle-complex="normal"/>
    </style:style>
    <style:style style:name="P134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bold" officeooo:paragraph-rsid="002a0eaf" style:font-size-asian="11pt" style:font-style-asian="normal" style:font-weight-asian="bold" style:font-style-complex="normal" style:font-weight-complex="bold"/>
    </style:style>
    <style:style style:name="P135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6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37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38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39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a36e8" style:font-size-asian="11pt" style:font-weight-asian="normal" style:font-size-complex="11pt" style:font-weight-complex="normal"/>
    </style:style>
    <style:style style:name="P140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c7dbd" style:font-size-asian="11pt" style:font-weight-asian="normal" style:font-size-complex="11pt" style:font-weight-complex="normal"/>
    </style:style>
    <style:style style:name="P141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</style:style>
    <style:style style:name="P142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officeooo:paragraph-rsid="002a0eaf"/>
    </style:style>
    <style:style style:name="P143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weight="normal" officeooo:paragraph-rsid="002a0eaf" style:font-weight-asian="normal" style:font-weight-complex="normal"/>
    </style:style>
    <style:style style:name="P144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145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officeooo:paragraph-rsid="002a36e8"/>
    </style:style>
    <style:style style:name="P146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</style:style>
    <style:style style:name="P147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a0eaf"/>
    </style:style>
    <style:style style:name="P148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a36e8"/>
    </style:style>
    <style:style style:name="P149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c7dbd"/>
    </style:style>
    <style:style style:name="P150" style:family="paragraph" style:parent-style-name="Table_20_Contents">
      <loext:graphic-properties draw:fill="solid" draw:fill-color="#2a6099" draw:opacity="100%"/>
      <style:paragraph-properties fo:text-align="center" style:justify-single-word="false" fo:background-color="#2a6099"/>
      <style:text-properties fo:color="#ffffff" loext:opacity="100%" style:font-name="Arial1" fo:font-weight="bold" officeooo:rsid="0022655a" officeooo:paragraph-rsid="0022655a" fo:background-color="#2a6099" style:font-weight-asian="bold" style:font-weight-complex="bold"/>
    </style:style>
    <style:style style:name="P151" style:family="paragraph" style:parent-style-name="Table_20_Contents">
      <loext:graphic-properties draw:fill="solid" draw:fill-color="#2a6099" draw:opacity="100%"/>
      <style:paragraph-properties fo:text-align="center" style:justify-single-word="false" fo:background-color="#2a6099"/>
      <style:text-properties fo:color="#ffffff" loext:opacity="100%" style:font-name="Arial1" fo:font-weight="bold" officeooo:rsid="0021c515" officeooo:paragraph-rsid="0021c515" fo:background-color="#2a6099" style:font-weight-asian="bold" style:font-weight-complex="bold"/>
    </style:style>
    <style:style style:name="P152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fo:color="#ffffff" loext:opacity="100%" style:font-name="Arial1" fo:font-size="11pt" fo:font-weight="bold" officeooo:paragraph-rsid="002a36e8" style:letter-kerning="false" style:font-name-asian="Calibri1" style:font-size-asian="11pt" style:language-asian="en" style:country-asian="US" style:font-weight-asian="bold" style:font-name-complex="Arial2" style:font-size-complex="8pt" style:font-weight-complex="bold"/>
    </style:style>
    <style:style style:name="P153" style:family="paragraph" style:parent-style-name="Table_20_Contents" style:list-style-name="WWNum1">
      <loext:graphic-properties draw:fill="none"/>
      <style:paragraph-properties fo:margin-left="0cm" fo:margin-right="0.199cm" fo:margin-top="0cm" fo:margin-bottom="0cm" style:contextual-spacing="false" fo:line-height="150%" fo:text-align="justify" style:justify-single-word="false" fo:orphans="2" fo:widows="2" fo:hyphenation-ladder-count="no-limit" fo:text-indent="-0.101cm" style:auto-text-indent="false" fo:background-color="transparent" text:number-lines="false" text:line-number="0" style:vertical-align="baseline" style:writing-mode="lr-tb"/>
      <style:text-properties fo:color="#000000" loext:opacity="100%" style:font-name="Arial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Table_20_Contents" style:list-style-name="WWNum1">
      <loext:graphic-properties draw:fill="none"/>
      <style:paragraph-properties fo:margin-left="0cm" fo:margin-right="0.199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/>
      <style:text-properties fo:color="#000000" loext:opacity="100%" style:font-name="Arial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5" style:family="paragraph" style:parent-style-name="Text_20_body">
      <style:paragraph-properties fo:margin-left="0cm" fo:margin-right="0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normal" officeooo:paragraph-rsid="00656a96" style:font-size-asian="12pt" style:font-weight-asian="normal" style:font-name-complex="Arial2" style:font-size-complex="12pt" style:font-weight-complex="normal"/>
    </style:style>
    <style:style style:name="P156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Arial1"/>
    </style:style>
    <style:style style:name="P157" style:family="paragraph" style:parent-style-name="Text_20_body" style:list-style-name="WWNum1">
      <loext:graphic-properties draw:fill="none"/>
      <style:paragraph-properties fo:margin-left="0.101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Arial1" fo:font-size="11pt" officeooo:paragraph-rsid="006e36de" style:font-size-asian="11pt" style:font-size-complex="11pt"/>
    </style:style>
    <style:style style:name="P158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/>
    </style:style>
    <style:style style:name="P159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/>
    </style:style>
    <style:style style:name="P160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80e106"/>
    </style:style>
    <style:style style:name="P161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officeooo:paragraph-rsid="00675a2f"/>
    </style:style>
    <style:style style:name="P162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675a2f"/>
    </style:style>
    <style:style style:name="P163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officeooo:paragraph-rsid="00677035"/>
    </style:style>
    <style:style style:name="P164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677035"/>
    </style:style>
    <style:style style:name="P165" style:family="paragraph" style:parent-style-name="Text_20_body" style:list-style-name="WWNum1"/>
    <style:style style:name="P166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67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168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5b9f3"/>
    </style:style>
    <style:style style:name="P169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16ad1"/>
    </style:style>
    <style:style style:name="P170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16ad1"/>
    </style:style>
    <style:style style:name="P171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50121"/>
    </style:style>
    <style:style style:name="P172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50121"/>
    </style:style>
    <style:style style:name="P173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6dfc8"/>
    </style:style>
    <style:style style:name="P174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77035"/>
    </style:style>
    <style:style style:name="P175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0b968"/>
    </style:style>
    <style:style style:name="P176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0b968"/>
    </style:style>
    <style:style style:name="P17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178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179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80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weight="normal" style:font-weight-asian="normal"/>
    </style:style>
    <style:style style:name="P181" style:family="paragraph" style:parent-style-name="Text_20_body">
      <style:paragraph-properties fo:text-align="justify" style:justify-single-word="false"/>
      <style:text-properties fo:font-size="11pt" fo:font-weight="bold" officeooo:paragraph-rsid="0086dfc8" style:font-size-asian="11pt" style:font-weight-asian="bold" style:font-size-complex="11pt" style:font-weight-complex="bold"/>
    </style:style>
    <style:style style:name="P182" style:family="paragraph" style:parent-style-name="Text_20_body">
      <style:paragraph-properties fo:text-align="center" style:justify-single-word="false"/>
      <style:text-properties fo:font-size="11pt" fo:font-weight="bold" officeooo:paragraph-rsid="0086dfc8" style:font-size-asian="11pt" style:font-weight-asian="bold" style:font-size-complex="11pt" style:font-weight-complex="bold"/>
    </style:style>
    <style:style style:name="P183" style:family="paragraph" style:parent-style-name="Text_20_body" style:list-style-name="WWNum1">
      <loext:graphic-properties draw:fill="none"/>
      <style:paragraph-properties fo:margin-left="-0.101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84" style:family="paragraph" style:parent-style-name="Text_20_body" style:list-style-name="WWNum1">
      <loext:graphic-properties draw:fill="none"/>
      <style:paragraph-properties fo:margin-left="0.101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85" style:family="paragraph" style:parent-style-name="Text_20_body" style:list-style-name="WWNum1">
      <loext:graphic-properties draw:fill="none"/>
      <style:paragraph-properties fo:margin-left="0.101cm" fo:margin-right="0.4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86" style:family="paragraph" style:parent-style-name="Text_20_body" style:list-style-name="WWNum1">
      <loext:graphic-properties draw:fill="none"/>
      <style:paragraph-properties fo:margin-left="0.101cm" fo:margin-right="0.4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.609cm"/>
        </style:tab-stops>
      </style:paragraph-properties>
      <style:text-properties fo:font-size="11pt" officeooo:paragraph-rsid="0086dfc8" style:font-size-asian="11pt" style:font-size-complex="11pt"/>
    </style:style>
    <style:style style:name="P187" style:family="paragraph" style:parent-style-name="Text_20_body">
      <style:paragraph-properties fo:text-align="center" style:justify-single-word="false"/>
    </style:style>
    <style:style style:name="P188" style:family="paragraph" style:parent-style-name="Text_20_body">
      <style:paragraph-properties fo:text-align="center" style:justify-single-word="false"/>
      <style:text-properties officeooo:paragraph-rsid="009f8bc4"/>
    </style:style>
    <style:style style:name="P189" style:family="paragraph" style:parent-style-name="Text_20_body">
      <style:paragraph-properties fo:text-align="center" style:justify-single-word="false"/>
      <style:text-properties officeooo:paragraph-rsid="00a08ff2"/>
    </style:style>
    <style:style style:name="P190" style:family="paragraph" style:parent-style-name="Text_20_body" style:list-style-name="">
      <style:paragraph-properties fo:text-align="center" style:justify-single-word="false"/>
      <style:text-properties officeooo:paragraph-rsid="00a08ff2"/>
    </style:style>
    <style:style style:name="P191" style:family="paragraph" style:parent-style-name="Text_20_body">
      <style:paragraph-properties fo:text-align="justify" style:justify-single-word="false"/>
      <style:text-properties officeooo:paragraph-rsid="00abe28c"/>
    </style:style>
    <style:style style:name="P192" style:family="paragraph" style:parent-style-name="Text_20_body" style:list-style-name="">
      <style:paragraph-properties fo:text-align="justify" style:justify-single-word="false"/>
      <style:text-properties officeooo:paragraph-rsid="00abe28c"/>
    </style:style>
    <style:style style:name="P193" style:family="paragraph" style:parent-style-name="Text_20_body" style:list-style-name="">
      <style:paragraph-properties fo:text-align="justify" style:justify-single-word="false"/>
      <style:text-properties officeooo:paragraph-rsid="00a08ff2"/>
    </style:style>
    <style:style style:name="P194" style:family="paragraph" style:parent-style-name="Text_20_body" style:list-style-name="">
      <style:paragraph-properties fo:text-align="justify" style:justify-single-word="false"/>
      <style:text-properties officeooo:paragraph-rsid="00adcca5"/>
    </style:style>
    <style:style style:name="P195" style:family="paragraph">
      <loext:graphic-properties draw:fill="none"/>
      <style:paragraph-properties fo:text-align="start"/>
      <style:text-properties fo:color="#000000" loext:opacity="100%" fo:font-size="18pt"/>
    </style:style>
    <style:style style:name="P196" style:family="paragraph">
      <loext:graphic-properties draw:fill="bitmap" draw:fill-image-name="msFillBitmap_20_1_20_-1" draw:fill-image-width="16.935cm" draw:fill-image-height="3.704cm" style:repeat="repeat" draw:fill-image-ref-point-x="0%" draw:fill-image-ref-point-y="76%" draw:fill-image-ref-point="top-left"/>
      <style:paragraph-properties fo:text-align="start"/>
      <style:text-properties fo:font-size="18pt"/>
    </style:style>
    <style:style style:name="P197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198" style:family="paragraph">
      <loext:graphic-properties draw:fill="solid" draw:fill-color="#ffffff" draw:opacity="88%"/>
      <style:paragraph-properties fo:text-align="start" style:writing-mode="lr-tb"/>
      <style:text-properties fo:font-size="18pt"/>
    </style:style>
    <style:style style:name="T1" style:family="text">
      <style:text-properties fo:color="#ffffff" loext:opacity="100%" fo:font-size="7pt" style:font-size-asian="7pt">
        <loext:char-complex-color loext:theme-type="light1" loext:color-type="theme"/>
      </style:text-properties>
    </style:style>
    <style:style style:name="T2" style:family="text">
      <style:text-properties fo:color="#ffffff" loext:opacity="100%" style:font-name="Arial1" fo:font-size="11pt" fo:font-weight="bold" style:letter-kerning="false" style:font-name-asian="Calibri1" style:font-size-asian="11pt" style:language-asian="en" style:country-asian="US" style:font-weight-asian="bold" style:font-name-complex="Arial2" style:font-size-complex="11pt" style:font-weight-complex="bold">
        <loext:char-complex-color loext:theme-type="light1" loext:color-type="theme"/>
      </style:text-properties>
    </style:style>
    <style:style style:name="T3" style:family="text">
      <style:text-properties fo:color="#ffffff" loext:opacity="100%" style:font-name="Arial1" fo:font-size="11pt" fo:font-weight="bold" style:letter-kerning="false" style:font-name-asian="Calibri1" style:font-size-asian="11pt" style:language-asian="en" style:country-asian="US" style:font-weight-asian="bold" style:font-name-complex="Arial2" style:font-size-complex="8pt" style:font-weight-complex="bold">
        <loext:char-complex-color loext:theme-type="light1" loext:color-type="theme"/>
      </style:text-properties>
    </style:style>
    <style:style style:name="T4" style:family="text">
      <style:text-properties fo:font-size="48pt" style:font-size-asian="48pt" style:language-asian="pt" style:country-asian="BR"/>
    </style:style>
    <style:style style:name="T5" style:family="text">
      <style:text-properties style:font-name="Arial1" fo:font-size="12pt" style:font-size-asian="12pt" style:font-name-complex="Arial2" style:font-size-complex="12pt" style:font-weight-complex="normal"/>
    </style:style>
    <style:style style:name="T6" style:family="text">
      <style:text-properties style:font-name="Arial1" fo:font-size="12pt" officeooo:rsid="006e36de" style:font-size-asian="12pt" style:font-name-complex="Arial2" style:font-size-complex="12pt" style:font-weight-complex="normal"/>
    </style:style>
    <style:style style:name="T7" style:family="text">
      <style:text-properties style:font-name="Arial1" fo:font-size="12pt" officeooo:rsid="006e487d" style:font-size-asian="12pt" style:font-name-complex="Arial2" style:font-size-complex="12pt" style:font-weight-complex="normal"/>
    </style:style>
    <style:style style:name="T8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9" style:family="text">
      <style:text-properties style:font-name="Arial1" fo:font-size="12pt" fo:font-style="normal" style:font-size-asian="12pt" style:font-style-asian="normal" style:font-name-complex="Arial2" style:font-size-complex="12pt" style:font-style-complex="normal"/>
    </style:style>
    <style:style style:name="T10" style:family="text">
      <style:text-properties style:font-name="Arial1" fo:font-size="12pt" fo:font-style="italic" style:font-size-asian="12pt" style:font-style-asian="italic" style:font-name-complex="Arial2" style:font-size-complex="12pt" style:font-style-complex="italic"/>
    </style:style>
    <style:style style:name="T11" style:family="text">
      <style:text-properties style:font-name="Arial1" fo:font-size="18pt" style:font-size-asian="18pt" style:font-name-complex="Arial2" style:font-size-complex="18pt"/>
    </style:style>
    <style:style style:name="T12" style:family="text">
      <style:text-properties style:font-name="Arial1" fo:font-size="18pt" officeooo:rsid="003bd677" style:font-size-asian="18pt" style:font-name-complex="Arial2" style:font-size-complex="18pt"/>
    </style:style>
    <style:style style:name="T13" style:family="text">
      <style:text-properties style:font-name="Arial1" style:font-name-complex="Arial2"/>
    </style:style>
    <style:style style:name="T14" style:family="text">
      <style:text-properties style:font-name="Arial1" style:font-name-complex="Arial2" style:font-weight-complex="normal"/>
    </style:style>
    <style:style style:name="T15" style:family="text">
      <style:text-properties style:font-name="Arial1" officeooo:rsid="0024c723" style:font-name-complex="Arial2"/>
    </style:style>
    <style:style style:name="T16" style:family="text">
      <style:text-properties style:font-name="Arial1" officeooo:rsid="00266e6b" style:font-name-complex="Arial2"/>
    </style:style>
    <style:style style:name="T17" style:family="text">
      <style:text-properties style:font-name="Arial1" officeooo:rsid="003da92c" style:font-name-complex="Arial2"/>
    </style:style>
    <style:style style:name="T18" style:family="text">
      <style:text-properties style:font-name="Arial1" fo:language="pt" fo:country="BR" officeooo:rsid="00ccbbdb" style:letter-kerning="false" style:language-complex="ar" style:country-complex="SA"/>
    </style:style>
    <style:style style:name="T19" style:family="text">
      <style:text-properties style:font-name="Arial1" fo:language="pt" fo:country="BR" officeooo:rsid="00cd250f" style:letter-kerning="false" style:language-complex="ar" style:country-complex="SA"/>
    </style:style>
    <style:style style:name="T20" style:family="text">
      <style:text-properties fo:color="#ee0000" loext:opacity="100%" style:font-name="Arial1" fo:font-size="24pt" style:font-size-asian="24pt" style:font-name-complex="Arial2" style:font-size-complex="24pt"/>
    </style:style>
    <style:style style:name="T21" style:family="text">
      <style:text-properties fo:color="#ee0000" loext:opacity="100%" style:font-name="Arial1" fo:font-style="italic" fo:font-weight="normal" style:font-style-asian="italic" style:font-weight-asian="normal" style:font-name-complex="Arial2" style:font-style-complex="italic"/>
    </style:style>
    <style:style style:name="T22" style:family="text">
      <style:text-properties fo:color="#ee0000" loext:opacity="100%" style:font-name="Arial1" fo:font-size="12pt" fo:font-style="italic" style:font-size-asian="12pt" style:font-style-asian="italic" style:font-name-complex="Arial2" style:font-size-complex="12pt" style:font-style-complex="italic" style:font-weight-complex="bold"/>
    </style:style>
    <style:style style:name="T23" style:family="text">
      <style:text-properties fo:color="#ee0000" loext:opacity="100%" fo:font-style="italic" style:font-style-asian="italic" style:font-style-complex="italic"/>
    </style:style>
    <style:style style:name="T24" style:family="text">
      <style:text-properties fo:font-size="12pt" fo:font-weight="normal" style:font-size-asian="12pt" style:font-weight-asian="normal" style:font-size-complex="12pt"/>
    </style:style>
    <style:style style:name="T25" style:family="text">
      <style:text-properties fo:font-size="12pt" fo:font-weight="normal" officeooo:rsid="001c13a9" style:font-size-asian="12pt" style:font-weight-asian="normal" style:font-size-complex="12pt"/>
    </style:style>
    <style:style style:name="T26" style:family="text">
      <style:text-properties fo:font-size="12pt" fo:font-weight="normal" officeooo:rsid="003fa9ab" style:font-size-asian="12pt" style:font-weight-asian="normal" style:font-size-complex="12pt"/>
    </style:style>
    <style:style style:name="T27" style:family="text">
      <style:text-properties fo:font-size="12pt" fo:font-weight="normal" style:font-size-asian="12pt" style:font-weight-asian="normal" style:font-name-complex="Arial2" style:font-size-complex="12pt" style:font-weight-complex="normal"/>
    </style:style>
    <style:style style:name="T28" style:family="text">
      <style:text-properties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9" style:family="text">
      <style:text-properties officeooo:rsid="004f1834"/>
    </style:style>
    <style:style style:name="T30" style:family="text">
      <style:text-properties officeooo:rsid="00656a96"/>
    </style:style>
    <style:style style:name="T31" style:family="text">
      <style:text-properties fo:language="pt" fo:country="BR" style:letter-kerning="false" style:font-name-complex="Arial2" style:language-complex="ar" style:country-complex="SA" style:font-weight-complex="bold"/>
    </style:style>
    <style:style style:name="T32" style:family="text">
      <style:text-properties fo:language="pt" fo:country="BR" officeooo:rsid="009ceb31" style:letter-kerning="false" style:language-complex="ar" style:country-complex="SA"/>
    </style:style>
    <style:style style:name="T33" style:family="text">
      <style:text-properties officeooo:rsid="002310d1"/>
    </style:style>
    <style:style style:name="T34" style:family="text">
      <style:text-properties officeooo:rsid="003da92c"/>
    </style:style>
    <style:style style:name="T35" style:family="text">
      <style:text-properties officeooo:rsid="004425e0"/>
    </style:style>
    <style:style style:name="T36" style:family="text">
      <style:text-properties officeooo:rsid="00422915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Arial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fo:color="#000000" loext:opacity="100%" style:font-name="Arial1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fo:color="#000000" loext:opacity="100%" style:font-name="Arial1" fo:font-size="12pt" fo:font-style="normal" fo:font-weight="normal" officeooo:rsid="001f8f5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fo:color="#000000" loext:opacity="100%" style:font-name="Arial1" fo:font-size="12pt" fo:font-style="normal" fo:font-weight="normal" officeooo:rsid="001da3b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3" style:family="text">
      <style:text-properties fo:color="#000000" loext:opacity="100%" style:font-name="Arial1" fo:font-style="normal" style:font-style-asian="normal" style:font-style-complex="normal"/>
    </style:style>
    <style:style style:name="T44" style:family="text">
      <style:text-properties fo:color="#000000" loext:opacity="100%" style:font-name="Arial1" fo:font-style="normal" officeooo:rsid="005d7977" style:font-style-asian="normal" style:font-style-complex="normal"/>
    </style:style>
    <style:style style:name="T45" style:family="text">
      <style:text-properties fo:color="#000000" loext:opacity="100%" fo:font-style="normal" style:font-style-asian="normal" style:font-style-complex="normal"/>
    </style:style>
    <style:style style:name="T46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000000" loext:opacity="100%" fo:font-size="11pt" fo:font-style="normal" style:font-size-asian="11pt" style:font-style-asian="normal" style:font-style-complex="normal"/>
    </style:style>
    <style:style style:name="T48" style:family="text">
      <style:text-properties fo:color="#000000" loext:opacity="100%" fo:font-size="11pt" fo:font-style="normal" style:font-size-asian="11pt" style:font-style-asian="normal" style:font-style-complex="normal" style:font-weight-complex="normal"/>
    </style:style>
    <style:style style:name="T49" style:family="text">
      <style:text-properties fo:color="#000000" loext:opacity="100%" fo:font-size="11pt" fo:font-style="normal" fo:font-weight="bold" style:font-size-asian="11pt" style:font-style-asian="normal" style:font-weight-asian="bold" style:font-style-complex="normal" style:font-weight-complex="bold"/>
    </style:style>
    <style:style style:name="T50" style:family="text">
      <style:text-properties fo:color="#000000" loext:opacity="100%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T51" style:family="text">
      <style:text-properties fo:color="#000000" loext:opacity="100%" fo:font-size="11pt" style:font-size-asian="11pt" style:font-weight-complex="normal"/>
    </style:style>
    <style:style style:name="T52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53" style:family="text">
      <style:text-properties fo:color="#000000" loext:opacity="100%" officeooo:rsid="0048af60"/>
    </style:style>
    <style:style style:name="T54" style:family="text">
      <style:text-properties fo:color="#000000" loext:opacity="100%" officeooo:rsid="0049e88c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6976c1" style:font-style-asian="normal" style:font-style-complex="normal"/>
    </style:style>
    <style:style style:name="T57" style:family="text">
      <style:text-properties officeooo:rsid="006e487d"/>
    </style:style>
    <style:style style:name="T58" style:family="text">
      <style:text-properties fo:font-weight="normal" style:font-weight-asian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323c62" style:font-weight-asian="normal" style:font-weight-complex="normal"/>
    </style:style>
    <style:style style:name="T61" style:family="text">
      <style:text-properties fo:font-weight="normal" officeooo:rsid="006c5fb0" style:font-weight-asian="normal" style:font-weight-complex="normal"/>
    </style:style>
    <style:style style:name="T62" style:family="text">
      <style:text-properties fo:font-weight="normal" officeooo:rsid="00a8cb4a" style:font-weight-asian="normal" style:font-weight-complex="normal"/>
    </style:style>
    <style:style style:name="T63" style:family="text">
      <style:text-properties fo:font-weight="normal" officeooo:rsid="00604734" style:font-weight-asian="normal"/>
    </style:style>
    <style:style style:name="T64" style:family="text">
      <style:text-properties officeooo:rsid="00604734"/>
    </style:style>
    <style:style style:name="T65" style:family="text">
      <style:text-properties fo:font-size="11pt" fo:font-weight="normal" style:font-size-asian="11pt" style:font-weight-asian="normal" style:font-size-complex="11pt"/>
    </style:style>
    <style:style style:name="T66" style:family="text">
      <style:text-properties fo:font-size="11pt" fo:font-weight="normal" style:font-size-asian="11pt" style:font-weight-asian="normal" style:font-size-complex="11pt" style:font-weight-complex="normal"/>
    </style:style>
    <style:style style:name="T67" style:family="text">
      <style:text-properties fo:font-size="11pt" fo:font-weight="normal" officeooo:rsid="002a0eaf" style:font-size-asian="11pt" style:font-weight-asian="normal" style:font-size-complex="11pt"/>
    </style:style>
    <style:style style:name="T68" style:family="text">
      <style:text-properties fo:font-size="11pt" fo:font-weight="normal" officeooo:rsid="002b2654" style:font-size-asian="11pt" style:font-weight-asian="normal" style:font-size-complex="11pt"/>
    </style:style>
    <style:style style:name="T69" style:family="text">
      <style:text-properties fo:font-size="11pt" style:font-size-asian="11pt" style:font-size-complex="11pt"/>
    </style:style>
    <style:style style:name="T70" style:family="text">
      <style:text-properties fo:font-size="11pt" officeooo:rsid="002b2654" style:font-size-asian="11pt" style:font-size-complex="11pt"/>
    </style:style>
    <style:style style:name="T71" style:family="text">
      <style:text-properties officeooo:rsid="002a0eaf"/>
    </style:style>
    <style:style style:name="T72" style:family="text">
      <style:text-properties officeooo:rsid="00323c62"/>
    </style:style>
    <style:style style:name="T73" style:family="text">
      <style:text-properties officeooo:rsid="002b2654"/>
    </style:style>
    <style:style style:name="T74" style:family="text">
      <style:text-properties officeooo:rsid="002c7dbd"/>
    </style:style>
    <style:style style:name="T75" style:family="text">
      <style:text-properties officeooo:rsid="006976c1"/>
    </style:style>
    <style:style style:name="T76" style:family="text">
      <style:text-properties officeooo:rsid="0048af60"/>
    </style:style>
    <style:style style:name="T77" style:family="text">
      <style:text-properties officeooo:rsid="0080b968"/>
    </style:style>
    <style:style style:name="T78" style:family="text">
      <style:text-properties fo:font-weight="bold"/>
    </style:style>
    <style:style style:name="T79" style:family="text">
      <style:text-properties officeooo:rsid="0080e106"/>
    </style:style>
    <style:style style:name="T80" style:family="text">
      <style:text-properties officeooo:rsid="00816ad1"/>
    </style:style>
    <style:style style:name="T81" style:family="text">
      <style:text-properties officeooo:rsid="00833625"/>
    </style:style>
    <style:style style:name="T82" style:family="text">
      <style:text-properties officeooo:rsid="00869faa"/>
    </style:style>
    <style:style style:name="T83" style:family="text">
      <style:text-properties officeooo:rsid="00897a26"/>
    </style:style>
    <style:style style:name="T84" style:family="text">
      <style:text-properties officeooo:rsid="009f8bc4"/>
    </style:style>
    <style:style style:name="T85" style:family="text">
      <style:text-properties officeooo:rsid="00a3bd95"/>
    </style:style>
    <style:style style:name="T86" style:family="text">
      <style:text-properties officeooo:rsid="00a53d83"/>
    </style:style>
    <style:style style:name="T87" style:family="text">
      <style:text-properties officeooo:rsid="00a732f1"/>
    </style:style>
    <style:style style:name="T88" style:family="text">
      <style:text-properties officeooo:rsid="00a8cb4a"/>
    </style:style>
    <style:style style:name="T89" style:family="text">
      <style:text-properties officeooo:rsid="00abe28c"/>
    </style:style>
    <style:style style:name="T90" style:family="text">
      <style:text-properties officeooo:rsid="00adcca5"/>
    </style:style>
    <style:style style:name="T91" style:family="text">
      <style:text-properties officeooo:rsid="00b874ef"/>
    </style:style>
    <style:style style:name="T92" style:family="text">
      <style:text-properties officeooo:rsid="009ceb31"/>
    </style:style>
    <style:style style:name="T93" style:family="text">
      <style:text-properties officeooo:rsid="00bbf85a"/>
    </style:style>
    <style:style style:name="T94" style:family="text">
      <style:text-properties officeooo:rsid="00bd99ff"/>
    </style:style>
    <style:style style:name="T95" style:family="text">
      <style:text-properties officeooo:rsid="00be2ba8"/>
    </style:style>
    <style:style style:name="T96" style:family="text">
      <style:text-properties officeooo:rsid="00c1c17a"/>
    </style:style>
    <style:style style:name="T97" style:family="text">
      <style:text-properties officeooo:rsid="00c244ff"/>
    </style:style>
    <style:style style:name="T98" style:family="text">
      <style:text-properties officeooo:rsid="00c79cff"/>
    </style:style>
    <style:style style:name="T99" style:family="text">
      <style:text-properties officeooo:rsid="00caf6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71cm" svg:stroke-linecap="butt" draw:fill="bitmap" draw:fill-image-name="msFillBitmap_20_1_20_-1" draw:fill-image-width="16.935cm" draw:fill-image-height="3.704cm" style:repeat="repeat" draw:fill-image-ref-point-x="0%" draw:fill-image-ref-point-y="76%" draw:fill-image-ref-point="top-left" draw:textarea-vertical-align="top" draw:auto-grow-height="false" fo:min-height="1.965cm" fo:min-width="20.36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cm" loext:decorative="false" fo:margin-left="0cm" fo:margin-right="0.012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71cm" svg:stroke-linecap="butt" draw:fill="gradient" draw:fill-gradient-name="Gradient_20_1" draw:textarea-vertical-align="top" draw:auto-grow-height="false" fo:min-height="0.633cm" fo:min-width="20.556cm" fo:padding-top="0.125cm" fo:padding-bottom="0.125cm" fo:padding-left="0.25cm" fo:padding-right="0.25cm" fo:wrap-option="wrap" draw:shadow="visible" draw:shadow-offset-x="-0.245cm" draw:shadow-offset-y="0.018cm" draw:shadow-color="#0070c0" draw:shadow-opacity="20%" loext:shadow-blur="0.706cm" loext:glow-radius="0.247cm" loext:glow-color="#558ed5" loext:glow-transparency="0%" loext:softedge-radius="0.035cm" loext:decorative="false" fo:margin-left="0.788cm" fo:margin-right="0.289cm" fo:margin-top="0.404cm" fo:margin-bottom="0.4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71cm" svg:stroke-linecap="butt" draw:fill="solid" draw:fill-color="#ffffff" draw:opacity="88%" draw:textarea-vertical-align="top" draw:auto-grow-height="false" fo:min-height="15.335cm" fo:min-width="21.258cm" fo:padding-top="0.125cm" fo:padding-bottom="0.125cm" fo:padding-left="0.25cm" fo:padding-right="0.25cm" fo:wrap-option="wrap" style:writing-mode="lr-tb" loext:decorative="false" fo:margin-left="0cm" fo:margin-right="0.032cm" fo:margin-top="0cm" fo:margin-bottom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h text:style-name="Heading_20_1" text:outline-level="1"/>
          <text:h text:style-name="Heading_20_1" text:outline-level="1"/>
          <text:h text:style-name="Heading_20_1" text:outline-level="1"/>
          <text:h text:style-name="Heading_20_1" text:outline-level="1"/>
          <text:h text:style-name="Heading_20_1" text:outline-level="1"/>
        </text:list-header>
      </text:list>
      <text:h text:style-name="P7" text:outline-level="1"/>
      <text:p text:style-name="P43"/>
      <text:list text:continue-numbering="true" text:style-name="WWNum1">
        <text:list-header>
          <text:p text:style-name="P42"><text:bookmark-start text:name="__RefHeading___Toc2205_1037354077"/><text:span text:style-name="T11">Documento de Especificação de Projeto Integrado</text:span><text:span text:style-name="T12">r</text:span><text:bookmark-end text:name="__RefHeading___Toc2205_1037354077"/></text:p>
        </text:list-header>
      </text:list>
      <text:p text:style-name="P46" loext:marker-style-name="T20"><text:span text:style-name="T20">Projeto Pilot - AgroConnect</text:span></text:p>
      <text:list text:continue-numbering="true" text:style-name="WWNum1">
        <text:list-header>
          <text:h text:style-name="P8" text:outline-level="1"/>
          <text:h text:style-name="P8" text:outline-level="1"/>
          <text:h text:style-name="P8" text:outline-level="1"/>
          <text:h text:style-name="P8" text:outline-level="1"/>
        </text:list-header>
      </text:list>
      <text:h text:style-name="P9" text:outline-level="1"/>
      <text:p text:style-name="P47"/>
      <text:p text:style-name="P47"/>
      <text:p text:style-name="P47"/>
      <text:p text:style-name="P47"/>
      <text:table-of-content text:style-name="Sect1" text:protected="true" text:name="Sumário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<text:soft-page-break/>Sumário</text:p>
          </text:index-title>
          <text:list text:continue-numbering="true" text:style-name="WWNum1">
            <text:list-item>
              <text:p text:style-name="P1"><text:a xlink:type="simple" xlink:href="#__RefHeading___Toc9205_3774562879" text:style-name="Index_20_Link" text:visited-style-name="Index_20_Link">PARTE 00 - HISTÓRICO DE VERSÃO DO PROJETO<text:tab/>4</text:a></text:p>
            </text:list-item>
            <text:list-item>
              <text:p text:style-name="P1"><text:a xlink:type="simple" xlink:href="#__RefHeading___Toc9207_3774562879" text:style-name="Index_20_Link" text:visited-style-name="Index_20_Link">PARTE 01 – IDENTIFICAÇÃO DO PRODUTO, EQUIPE E REPOSITÓRIO<text:tab/>5</text:a></text:p>
            </text:list-item>
            <text:list-item>
              <text:p text:style-name="P2"><text:a xlink:type="simple" xlink:href="#__RefHeading___Toc9209_3774562879" text:style-name="Index_20_Link" text:visited-style-name="Index_20_Link">1 IDENTIFICAÇÃO DO PRODUTO<text:tab/>5</text:a></text:p>
            </text:list-item>
            <text:list-item>
              <text:p text:style-name="P2"><text:a xlink:type="simple" xlink:href="#__RefHeading___Toc15531_3774562879" text:style-name="Index_20_Link" text:visited-style-name="Index_20_Link">2 DESCRIÇÃO GERAL DO PRODUTO<text:tab/>6</text:a></text:p>
            </text:list-item>
            <text:list-item>
              <text:p text:style-name="P3"><text:a xlink:type="simple" xlink:href="#__RefHeading___Toc15533_3774562879" text:style-name="Index_20_Link" text:visited-style-name="Index_20_Link">2.1 Resumo do Negócio<text:tab/>6</text:a></text:p>
            </text:list-item>
            <text:list-item>
              <text:p text:style-name="P3"><text:a xlink:type="simple" xlink:href="#__RefHeading___Toc9213_3774562879" text:style-name="Index_20_Link" text:visited-style-name="Index_20_Link">2.2 Problemas Identificados<text:tab/>6</text:a></text:p>
            </text:list-item>
            <text:list-item>
              <text:p text:style-name="P2"><text:a xlink:type="simple" xlink:href="#__RefHeading___Toc9215_3774562879" text:style-name="Index_20_Link" text:visited-style-name="Index_20_Link">3 EQUIPE DO PROJETO<text:tab/>7</text:a></text:p>
            </text:list-item>
            <text:list-item>
              <text:p text:style-name="P2"><text:a xlink:type="simple" xlink:href="#__RefHeading___Toc9217_3774562879" text:style-name="Index_20_Link" text:visited-style-name="Index_20_Link">4 REPOSITÓRIOS E ARTEFATOS DO PROJETO<text:tab/>8</text:a></text:p>
            </text:list-item>
            <text:list-item>
              <text:p text:style-name="P1"><text:a xlink:type="simple" xlink:href="#__RefHeading___Toc14297_3774562879" text:style-name="Index_20_Link" text:visited-style-name="Index_20_Link">PARTE 02 – PLANEJAMENTO DO SEMESTRE<text:tab/>8</text:a></text:p>
            </text:list-item>
            <text:list-item>
              <text:p text:style-name="P2"><text:a xlink:type="simple" xlink:href="#__RefHeading___Toc2537_3781650801" text:style-name="Index_20_Link" text:visited-style-name="Index_20_Link">5 SITUAÇÃO ATUAL DO PROJETO<text:tab/>8</text:a></text:p>
            </text:list-item>
            <text:list-item>
              <text:p text:style-name="P2"><text:a xlink:type="simple" xlink:href="#__RefHeading___Toc9225_3774562879" text:style-name="Index_20_Link" text:visited-style-name="Index_20_Link">6 OBJETIVOS DO SEMESTRE<text:tab/>9</text:a></text:p>
            </text:list-item>
            <text:list-item>
              <text:p text:style-name="P2"><text:a xlink:type="simple" xlink:href="#__RefHeading___Toc9239_3774562879" text:style-name="Index_20_Link" text:visited-style-name="Index_20_Link">7 CRONOGRAMA DO SEMESTRE<text:tab/>10</text:a></text:p>
            </text:list-item>
            <text:list-item>
              <text:p text:style-name="P1"><text:a xlink:type="simple" xlink:href="#__RefHeading___Toc18047_3774562879" text:style-name="Index_20_Link" text:visited-style-name="Index_20_Link">PARTE 03 – ENTENDIMENTO DO PÚBLICO, DO NEGÓCIO E LEVANTAMENTO INICIAL DE REQUISITOS<text:tab/>10</text:a></text:p>
            </text:list-item>
            <text:list-item>
              <text:p text:style-name="P2"><text:a xlink:type="simple" xlink:href="#__RefHeading___Toc18049_3774562879" text:style-name="Index_20_Link" text:visited-style-name="Index_20_Link">8 PÚBLICO-ALVO DO PRODUTO<text:tab/>10</text:a></text:p>
            </text:list-item>
            <text:list-item>
              <text:p text:style-name="P2"><text:a xlink:type="simple" xlink:href="#__RefHeading___Toc9243_3774562879" text:style-name="Index_20_Link" text:visited-style-name="Index_20_Link">9 CONTEXTO DE NEGÓCIO<text:tab/>11</text:a></text:p>
            </text:list-item>
            <text:list-item>
              <text:p text:style-name="P2"><text:a xlink:type="simple" xlink:href="#__RefHeading___Toc9249_3774562879" text:style-name="Index_20_Link" text:visited-style-name="Index_20_Link">10 SOLUÇÕES EXISTENTES<text:tab/>11</text:a></text:p>
            </text:list-item>
            <text:list-item>
              <text:p text:style-name="P2"><text:a xlink:type="simple" xlink:href="#__RefHeading___Toc2207_1037354077" text:style-name="Index_20_Link" text:visited-style-name="Index_20_Link">11 PESQUISA COM USUÁRIOS<text:tab/>12</text:a></text:p>
            </text:list-item>
            <text:list-item>
              <text:p text:style-name="P2"><text:a xlink:type="simple" xlink:href="#__RefHeading___Toc2209_1037354077" text:style-name="Index_20_Link" text:visited-style-name="Index_20_Link">12 RESULTADOS DE PESQUISA COM USUÁRIO<text:tab/>13</text:a></text:p>
            </text:list-item>
            <text:list-item>
              <text:p text:style-name="P2"><text:a xlink:type="simple" xlink:href="#__RefHeading___Toc9257_3774562879" text:style-name="Index_20_Link" text:visited-style-name="Index_20_Link">13 REGRAS DE NEGÓCIO<text:tab/>14</text:a></text:p>
            </text:list-item>
            <text:list-item>
              <text:p text:style-name="P2"><text:a xlink:type="simple" xlink:href="#__RefHeading___Toc9259_3774562879" text:style-name="Index_20_Link" text:visited-style-name="Index_20_Link">14 REQUISITOS FUNCIONAIS<text:tab/>15</text:a></text:p>
            </text:list-item>
            <text:list-item>
              <text:p text:style-name="P2"><text:a xlink:type="simple" xlink:href="#__RefHeading___Toc9261_3774562879" text:style-name="Index_20_Link" text:visited-style-name="Index_20_Link">15 REQUISITOS NÃO FUNCIONAIS<text:tab/>16</text:a></text:p>
            </text:list-item>
            <text:list-item>
              <text:p text:style-name="P1"><text:a xlink:type="simple" xlink:href="#__RefHeading___Toc9263_3774562879" text:style-name="Index_20_Link" text:visited-style-name="Index_20_Link">PARTE 04 – DESIGN, MODELAGEM, DADOS E SOLUÇÃO TECNOLÓGICA<text:tab/>17</text:a></text:p>
            </text:list-item>
            <text:list-item>
              <text:p text:style-name="P2"><text:a xlink:type="simple" xlink:href="#__RefHeading___Toc9265_3774562879" text:style-name="Index_20_Link" text:visited-style-name="Index_20_Link">16 DESIGN DA SOLUÇÃO E EXPERIÊNCIA DO USUÁRIO<text:tab/>17</text:a></text:p>
            </text:list-item>
            <text:list-item>
              <text:p text:style-name="P3"><text:a xlink:type="simple" xlink:href="#__RefHeading___Toc9267_3774562879" text:style-name="Index_20_Link" text:visited-style-name="Index_20_Link">16.1 Fluxo de Navegação<text:tab/>17</text:a></text:p>
            </text:list-item>
            <text:list-item>
              <text:p text:style-name="P3"><text:a xlink:type="simple" xlink:href="#__RefHeading___Toc9275_3774562879COPY_IS_MOVE" text:style-name="Index_20_Link" text:visited-style-name="Index_20_Link">16.2 Protótipos do Sistema<text:tab/>24</text:a></text:p>
            </text:list-item>
            <text:list-item>
              <text:p text:style-name="P2"><text:a xlink:type="simple" xlink:href="#__RefHeading___Toc2211_1037354077" text:style-name="Index_20_Link" text:visited-style-name="Index_20_Link">17 GESTÃO DO PROJETO DE MODELAGEM DO SISTEMA<text:tab/>26</text:a></text:p>
            </text:list-item>
            <text:list-item>
              <text:p text:style-name="P3"><text:a xlink:type="simple" xlink:href="#__RefHeading___Toc2213_1037354077" text:style-name="Index_20_Link" text:visited-style-name="Index_20_Link"><text:soft-page-break/>17.1 Organização do Projeto (Abordagem Ágil)<text:tab/>26</text:a></text:p>
            </text:list-item>
            <text:list-item>
              <text:p text:style-name="P3"><text:a xlink:type="simple" xlink:href="#__RefHeading___Toc2216_1037354077" text:style-name="Index_20_Link" text:visited-style-name="Index_20_Link">17.2 Modelagem e Diagramas do Sistema<text:tab/>27</text:a></text:p>
            </text:list-item>
          </text:list>
        </text:index-body>
      </text:table-of-content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><text:bookmark-start text:name="_Toc221199204"/><text:bookmark-start text:name="__RefHeading___Toc9205_3774562879"/><text:soft-page-break/>PARTE 00 - HISTÓRICO DE VERSÃO DO PROJETO<text:bookmark-end text:name="_Toc221199204"/><text:bookmark-end text:name="__RefHeading___Toc9205_3774562879"/></text:h>
      <text:h text:style-name="P38" text:outline-level="1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46" loext:marker-style-name="T2"><text:span text:style-name="T2">Versão</text:span><text:span text:style-name="T2"/></text:p>
          </table:table-cell>
          <table:table-cell table:style-name="Tabela1.A1" office:value-type="string">
            <text:p text:style-name="P146" loext:marker-style-name="T2"><text:span text:style-name="T2">Período</text:span><text:span text:style-name="T2"/></text:p>
          </table:table-cell>
          <table:table-cell table:style-name="Tabela1.A1" office:value-type="string">
            <text:p text:style-name="P146" loext:marker-style-name="T2"><text:span text:style-name="T2">Fase</text:span><text:span text:style-name="T2"/></text:p>
          </table:table-cell>
          <table:table-cell table:style-name="Tabela1.D1" office:value-type="string">
            <text:p text:style-name="P146" loext:marker-style-name="T2"><text:span text:style-name="T2">Data</text:span><text:span text:style-name="T2"/></text:p>
          </table:table-cell>
          <table:table-cell table:style-name="Tabela1.A1" office:value-type="string">
            <text:p text:style-name="P146" loext:marker-style-name="T2"><text:span text:style-name="T2">Descrição</text:span><text:span text:style-name="T2"/></text:p>
          </table:table-cell>
        </table:table-row>
        <table:table-row table:style-name="Tabela1.2">
          <table:table-cell table:style-name="Tabela1.A2" office:value-type="string">
            <text:p text:style-name="P85">1.0</text:p>
          </table:table-cell>
          <table:table-cell table:style-name="Tabela1.B2" office:value-type="string">
            <text:p text:style-name="P85">1º</text:p>
          </table:table-cell>
          <table:table-cell table:style-name="Tabela1.C2" office:value-type="string">
            <text:p text:style-name="P86">01</text:p>
          </table:table-cell>
          <table:table-cell table:style-name="Tabela1.D2" office:value-type="string">
            <text:p text:style-name="P119"><text:span text:style-name="T25">13</text:span><text:span text:style-name="T24">/0</text:span><text:span text:style-name="T26">2</text:span><text:span text:style-name="T24">/2026</text:span></text:p>
          </table:table-cell>
          <table:table-cell table:style-name="Tabela1.E2" office:value-type="string">
            <text:p text:style-name="P87">Criação inicial do documento do projeto, definição do nome do produto, descrição geral, identificação da equipe e planejamento do semestre.</text:p>
          </table:table-cell>
        </table:table-row>
        <table:table-row table:style-name="Tabela1.3">
          <table:table-cell table:style-name="Tabela1.A3" office:value-type="string">
            <text:p text:style-name="P120"><text:span text:style-name="T24">1.</text:span><text:span text:style-name="T25">0</text:span></text:p>
          </table:table-cell>
          <table:table-cell table:style-name="Tabela1.B3" office:value-type="string">
            <text:p text:style-name="P85">1º</text:p>
          </table:table-cell>
          <table:table-cell table:style-name="Tabela1.C3" office:value-type="string">
            <text:p text:style-name="P86">02</text:p>
          </table:table-cell>
          <table:table-cell table:style-name="Tabela1.D3" office:value-type="string">
            <text:p text:style-name="P119"><text:span text:style-name="T25">28</text:span><text:span text:style-name="T24">/0</text:span><text:span text:style-name="T26">2</text:span><text:span text:style-name="T25">/</text:span><text:span text:style-name="T24">2026</text:span></text:p>
          </table:table-cell>
          <table:table-cell table:style-name="Tabela1.E3" office:value-type="string">
            <text:p text:style-name="P87">Ajustes na descrição do produto, inclusão dos objetivos do semestre, revisão do planejamento e primeiros refinamentos a partir do feedback recebido.</text:p>
          </table:table-cell>
        </table:table-row>
        <table:table-row table:style-name="Tabela1.3">
          <table:table-cell table:style-name="Tabela1.A4" office:value-type="string">
            <text:p text:style-name="P88">1.<text:span text:style-name="T29">1</text:span></text:p>
          </table:table-cell>
          <table:table-cell table:style-name="Tabela1.B4" office:value-type="string">
            <text:p text:style-name="P88">2º</text:p>
          </table:table-cell>
          <table:table-cell table:style-name="Tabela1.C4" office:value-type="string">
            <text:p text:style-name="P89">01</text:p>
          </table:table-cell>
          <table:table-cell table:style-name="Tabela1.D4" office:value-type="string">
            <text:p text:style-name="P88"><text:span text:style-name="T29">02</text:span>/03/2026</text:p>
          </table:table-cell>
          <table:table-cell table:style-name="Tabela1.E4" office:value-type="string">
            <text:p text:style-name="P91">Documentação inicial focada na Logística Inteligente e Garantia Financeira. Estabelece<text:span text:style-name="T29">mos</text:span> <text:span text:style-name="T29">também </text:span>o levantamento d<text:span text:style-name="T29">os</text:span> requisitos (RF/RNF/RN). </text:p>
          </table:table-cell>
        </table:table-row>
        <table:table-row table:style-name="Tabela1.5">
          <table:table-cell table:style-name="Tabela1.A5" office:value-type="string">
            <text:p text:style-name="P103">1.2</text:p>
          </table:table-cell>
          <table:table-cell table:style-name="Tabela1.B5" office:value-type="string">
            <text:p text:style-name="P90">2º</text:p>
          </table:table-cell>
          <table:table-cell table:style-name="Tabela1.C5" office:value-type="string">
            <text:p text:style-name="P104">01</text:p>
          </table:table-cell>
          <table:table-cell table:style-name="Tabela1.D5" office:value-type="string">
            <text:p text:style-name="P92">05/03/2026</text:p>
          </table:table-cell>
          <table:table-cell table:style-name="Tabela1.E5" office:value-type="string">
            <text:p text:style-name="P93"><text:span text:style-name="T29">M</text:span>ode<text:span text:style-name="T29">lagem</text:span> <text:span text:style-name="T29">d</text:span>os fluxos operacionais d<text:span text:style-name="T29">o </text:span>Embarcador, Transportador e o mecanismo de Escrow Logístico (retenção de pagamentos). A etapa incluiu a criação de wireframes de baixa fidelidade para validar a jornada do usuário, abrangendo desde o matching inteligente de cargas e validação de seguros até o monitoramento de entregas e liquidação financeira. </text:p>
          </table:table-cell>
        </table:table-row>
        <table:table-row table:style-name="Tabela1.6">
          <table:table-cell table:style-name="Tabela1.A6" office:value-type="string">
            <text:p text:style-name="P105">2.0</text:p>
          </table:table-cell>
          <table:table-cell table:style-name="Tabela1.B6" office:value-type="string">
            <text:p text:style-name="P105">2º</text:p>
          </table:table-cell>
          <table:table-cell table:style-name="Tabela1.C6" office:value-type="string">
            <text:p text:style-name="P106">02</text:p>
          </table:table-cell>
          <table:table-cell table:style-name="Tabela1.D6" office:value-type="string">
            <text:p text:style-name="P94">11/04/2026</text:p>
          </table:table-cell>
          <table:table-cell table:style-name="Tabela1.E6" office:value-type="string">
            <text:p text:style-name="P93">Realização e análise da pesquisa com <text:span text:style-name="T83">4</text:span> usuários, definição da gestão via Kanban e atualização integral da documentação para a Fase 02.</text:p>
          </table:table-cell>
        </table:table-row>
        <table:table-row table:style-name="Tabela1.7">
          <table:table-cell table:style-name="Tabela1.A7" office:value-type="string">
            <text:p text:style-name="P105">2.1</text:p>
          </table:table-cell>
          <table:table-cell table:style-name="Tabela1.B7" office:value-type="string">
            <text:p text:style-name="P105">2º</text:p>
          </table:table-cell>
          <table:table-cell table:style-name="Tabela1.C7" office:value-type="string">
            <text:p text:style-name="P106">02</text:p>
          </table:table-cell>
          <table:table-cell table:style-name="Tabela1.D7" office:value-type="string">
            <text:p text:style-name="P95">14/04/2026</text:p>
          </table:table-cell>
          <table:table-cell table:style-name="Tabela1.E7" office:value-type="string">
            <text:p text:style-name="P96">Alterações no protótipo de baixa fidelidade de acordo com o resultado obtido na pesquisa.</text:p>
          </table:table-cell>
        </table:table-row>
        <table:table-row table:style-name="Tabela1.7">
          <table:table-cell table:style-name="Tabela1.A8" office:value-type="string">
            <text:p text:style-name="P111">2.2</text:p>
          </table:table-cell>
          <table:table-cell table:style-name="Tabela1.B8" office:value-type="string">
            <text:p text:style-name="P107">2º</text:p>
          </table:table-cell>
          <table:table-cell table:style-name="Tabela1.C8" office:value-type="string">
            <text:p text:style-name="P112">02</text:p>
          </table:table-cell>
          <table:table-cell table:style-name="Tabela1.D8" office:value-type="string">
            <text:p text:style-name="P95">17/04/2026</text:p>
          </table:table-cell>
          <table:table-cell table:style-name="Tabela1.E8" office:value-type="string">
            <text:p text:style-name="P96">Elaboração dos diagramas de atividade e classe.</text:p>
          </table:table-cell>
        </table:table-row>
        <table:table-row table:style-name="Tabela1.7">
          <table:table-cell table:style-name="Tabela1.A9" office:value-type="string">
            <text:p text:style-name="P111">2.2.1</text:p>
          </table:table-cell>
          <table:table-cell table:style-name="Tabela1.B9" office:value-type="string">
            <text:p text:style-name="P107">2º</text:p>
          </table:table-cell>
          <table:table-cell table:style-name="Tabela1.C9" office:value-type="string">
            <text:p text:style-name="P112">02</text:p>
          </table:table-cell>
          <table:table-cell table:style-name="Tabela1.D9" office:value-type="string">
            <text:p text:style-name="P95">18/04/2026</text:p>
          </table:table-cell>
          <table:table-cell table:style-name="Tabela1.E9" office:value-type="string">
            <text:p text:style-name="P96">Atualização do documento e formatação.</text:p>
            <text:p text:style-name="P96"/>
          </table:table-cell>
        </table:table-row>
        <table:table-row table:style-name="Tabela1.7">
          <table:table-cell table:style-name="Tabela1.A10" office:value-type="string">
            <text:p text:style-name="P113">2.2.<text:span text:style-name="T94">2</text:span></text:p>
          </table:table-cell>
          <table:table-cell table:style-name="Tabela1.B10" office:value-type="string">
            <text:p text:style-name="P108">2º</text:p>
          </table:table-cell>
          <table:table-cell table:style-name="Tabela1.C10" office:value-type="string">
            <text:p text:style-name="P114">02</text:p>
          </table:table-cell>
          <table:table-cell table:style-name="Tabela1.D10" office:value-type="string">
            <text:p text:style-name="P97">19/04/2026</text:p>
          </table:table-cell>
          <table:table-cell table:style-name="Tabela1.E10" office:value-type="string">
            <text:p text:style-name="P98">Criação do Repositório do código fonte no GitHub.</text:p>
          </table:table-cell>
        </table:table-row>
        <text:soft-page-break/>
        <table:table-row table:style-name="Tabela1.7">
          <table:table-cell table:style-name="Tabela1.A11" office:value-type="string">
            <text:p text:style-name="P115">2.3</text:p>
          </table:table-cell>
          <table:table-cell table:style-name="Tabela1.B11" office:value-type="string">
            <text:p text:style-name="P109">2º</text:p>
          </table:table-cell>
          <table:table-cell table:style-name="Tabela1.C11" office:value-type="string">
            <text:p text:style-name="P116">03</text:p>
          </table:table-cell>
          <table:table-cell table:style-name="Tabela1.D11" office:value-type="string">
            <text:p text:style-name="P99">12/05/2026</text:p>
          </table:table-cell>
          <table:table-cell table:style-name="Tabela1.E11" office:value-type="string">
            <text:p text:style-name="P100"><text:span text:style-name="T95">Evolução</text:span> do Protótipo de baixa Fidelidade no Figma para Alta Fidelidade.</text:p>
          </table:table-cell>
        </table:table-row>
        <table:table-row table:style-name="Tabela1.7">
          <table:table-cell table:style-name="Tabela1.A12" office:value-type="string">
            <text:p text:style-name="P115">2.3.1</text:p>
          </table:table-cell>
          <table:table-cell table:style-name="Tabela1.B12" office:value-type="string">
            <text:p text:style-name="P109">2º</text:p>
          </table:table-cell>
          <table:table-cell table:style-name="Tabela1.C12" office:value-type="string">
            <text:p text:style-name="P116">03</text:p>
          </table:table-cell>
          <table:table-cell table:style-name="Tabela1.D12" office:value-type="string">
            <text:p text:style-name="P99">13/05/2026</text:p>
          </table:table-cell>
          <table:table-cell table:style-name="Tabela1.E12" office:value-type="string">
            <text:p text:style-name="P100">Adicionada a Tela de Login ao P<text:span text:style-name="T95">r</text:span>otótipo de Alta Fidelidade.</text:p>
          </table:table-cell>
        </table:table-row>
        <table:table-row table:style-name="Tabela1.13">
          <table:table-cell table:style-name="Tabela1.A13" office:value-type="string">
            <text:p text:style-name="P117">2.3.2</text:p>
          </table:table-cell>
          <table:table-cell table:style-name="Tabela1.B13" office:value-type="string">
            <text:p text:style-name="P110">2º</text:p>
          </table:table-cell>
          <table:table-cell table:style-name="Tabela1.C13" office:value-type="string">
            <text:p text:style-name="P118">03</text:p>
          </table:table-cell>
          <table:table-cell table:style-name="Tabela1.D13" office:value-type="string">
            <text:p text:style-name="P101">13/05/2026</text:p>
          </table:table-cell>
          <table:table-cell table:style-name="Tabela1.E13" office:value-type="string">
            <text:p text:style-name="P102">Atualização no documento de Especificação, <text:span text:style-name="T98">s</text:span>endo <text:span text:style-name="T98">as </text:span>modifica<text:span text:style-name="T98">ções realizadas no </text:span>Histórico de Versão, Repositório de Artefatos <text:span text:style-name="T98">e Refinamento dos Requisitos.</text:span></text:p>
          </table:table-cell>
        </table:table-row>
      </table:table>
      <text:h text:style-name="P38" text:outline-level="1"/>
      <text:h text:style-name="P38" text:outline-level="1"/>
      <text:h text:style-name="P38" text:outline-level="1"><text:bookmark-start text:name="_Toc221199205"/><text:bookmark-start text:name="__RefHeading___Toc9207_3774562879"/>PARTE 01 – IDENTIFICAÇÃO DO PRODUTO, EQUIPE E REPOSITÓRIO<text:bookmark-end text:name="_Toc221199205"/><text:bookmark-end text:name="__RefHeading___Toc9207_3774562879"/></text:h>
      <text:h text:style-name="P26" text:outline-level="2"><text:bookmark-start text:name="_Toc221199206"/><text:bookmark-start text:name="__RefHeading___Toc9209_3774562879"/>1 IDENTIFICAÇÃO DO PRODUTO<text:bookmark-end text:name="_Toc221199206"/><text:bookmark-end text:name="__RefHeading___Toc9209_3774562879"/></text:h>
      <text:p text:style-name="P48" loext:marker-style-name="T8"/>
      <text:p text:style-name="P49">Nome do Produto: </text:p>
      <text:p text:style-name="P50">AgroConnect – Projeto Pilot</text:p>
      <text:p text:style-name="P51"/>
      <text:p text:style-name="P51">Descrição do Produto:</text:p>
      <text:p text:style-name="P70"><text:span text:style-name="T40">O </text:span><text:span text:style-name="T41">Projeto </text:span><text:span text:style-name="T40">PILOT é um </text:span><text:span text:style-name="T41">bloco</text:span><text:span text:style-name="T42"> </text:span><text:span text:style-name="T41">independente </text:span><text:span text:style-name="T42">do aplicativo AgroConnect, </text:span><text:span text:style-name="T41">voltado para a</text:span><text:span text:style-name="T40"> logística inteligente e garantia operacional desenvolvido para conectar caminhoneiros e transportadoras a produtores e empresas do agronegócio. Ele serve para gerenciar o transporte de grandes cargas e a distribuição final, garantindo que a mercadoria seja entregue com segurança e dentro dos prazos através de monitoramento em tempo real e seguro obrigatório. O foco principal é resolver a desorganização e a falta de confiança no frete rural, utilizando um sistema de pagamento protegido onde o transportador só recebe o valor após a entrega ser confirmada conforme o contrato. Assim, o software assegura a execução física da logística e protege todas as partes contra prejuízos financeiros e falhas operacionais no campo.</text:span></text:p>
      <text:h text:style-name="P28" text:outline-level="2"><text:bookmark-start text:name="_Toc221199207"/><text:bookmark-start text:name="__RefHeading___Toc15531_3774562879"/><text:soft-page-break/>2 DESCRIÇÃO GERAL DO PRODUTO<text:bookmark-end text:name="_Toc221199207"/><text:bookmark-end text:name="__RefHeading___Toc15531_3774562879"/></text:h>
      <text:list text:continue-numbering="true" text:style-name="WWNum1">
        <text:list-header>
          <text:h text:style-name="P17" text:outline-level="3"><text:bookmark-start text:name="__RefHeading___Toc15533_3774562879"/>2.1 Resumo do Negócio<text:bookmark-end text:name="__RefHeading___Toc15533_3774562879"/></text:h>
          <text:p text:style-name="P155"><text:bookmark text:name="p-rc_808adf09d99e19e4-288"/>O Bloco Pilot -AgroConnect est<text:span text:style-name="T30">ará</text:span> inserido no setor de logística de transporte de cargas para o agronegócio brasileiro, um ambiente onde a movimentação de mercadorias ainda depende fortemente de processos informais e manuais. A atividade principal deste contexto é o escoamento físico de grandes safras das fazendas para indústrias, além da distribuição de insumos e produtos na modalidade de "última milha". Este cenário é extremamente relevante pois a falta de integração e segurança nas entregas gera prejuízos financeiros e riscos operacionais constantes tanto para produtores quanto para transportadores. O serviço busca profissionalizar essa logística, garantindo proteção financeira e previsibilidade para todos os envolvidos na cadeia produtiva rural.</text:p>
          <text:h text:style-name="P18" text:outline-level="3"><text:bookmark-start text:name="_Toc221199209"/><text:bookmark-start text:name="__RefHeading___Toc9213_3774562879"/>2.2 Problemas Identificados<text:bookmark-end text:name="_Toc221199209"/><text:bookmark-end text:name="__RefHeading___Toc9213_3774562879"/></text:h>
        </text:list-header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4" loext:marker-style-name="T5"><text:span text:style-name="T5">Item</text:span><text:span text:style-name="T5"/></text:p>
          </table:table-cell>
          <table:table-cell table:style-name="Tabela2.A1" office:value-type="string">
            <text:p text:style-name="P74" loext:marker-style-name="T5"><text:span text:style-name="T5">Descrição</text:span><text:span text:style-name="T5"/></text:p>
          </table:table-cell>
        </table:table-row>
        <table:table-row table:style-name="Tabela2.2">
          <table:table-cell table:style-name="Tabela2.A2" office:value-type="string">
            <text:p text:style-name="P78" loext:marker-style-name="T14"><text:span text:style-name="T14">O problema de</text:span><text:span text:style-name="T14"/></text:p>
          </table:table-cell>
          <table:table-cell table:style-name="Tabela2.B2" office:value-type="string">
            <text:p text:style-name="P53"><text:span text:style-name="T31">Desorganização e falta de confiança na contratação de fretes. </text:span>Atualmente, a contratação de transporte no campo é feita de forma informal e desconectada, sem um processo de verificação rigoroso de quem está transportando a carga. </text:p>
          </table:table-cell>
        </table:table-row>
        <table:table-row table:style-name="Tabela2.3">
          <table:table-cell table:style-name="Tabela2.A3" office:value-type="string">
            <text:p text:style-name="P78" loext:marker-style-name="T14"><text:span text:style-name="T14">Afeta</text:span><text:span text:style-name="T14"/></text:p>
          </table:table-cell>
          <table:table-cell table:style-name="Tabela2.B3" office:value-type="string">
            <text:p text:style-name="P53">Produtores rurais e empresas compradoras que dependem do escoamento da produção.</text:p>
          </table:table-cell>
        </table:table-row>
        <table:table-row table:style-name="Tabela2.4">
          <table:table-cell table:style-name="Tabela2.A2" office:value-type="string">
            <text:p text:style-name="P78" loext:marker-style-name="T14"><text:span text:style-name="T14">Cujo impacto é</text:span><text:span text:style-name="T14"/></text:p>
          </table:table-cell>
          <table:table-cell table:style-name="Tabela2.B4" office:value-type="string">
            <text:p text:style-name="P54">Incerteza sobre a chegada da mercadoria, riscos de desvios, atrasos constantes e falta de padronização nos preços e prazos. </text:p>
          </table:table-cell>
        </table:table-row>
        <table:table-row table:style-name="Tabela2.5">
          <table:table-cell table:style-name="Tabela2.A3" office:value-type="string">
            <text:p text:style-name="P78" loext:marker-style-name="T14"><text:span text:style-name="T14">Benefícios de uma solução seriam</text:span><text:span text:style-name="T14"/></text:p>
          </table:table-cell>
          <table:table-cell table:style-name="Tabela2.B5" office:value-type="string">
            <text:p text:style-name="P54">Maior segurança jurídica e operacional, garantia de que apenas transportadores verificados manuseiem a carga e centralização da gestão logística em um único local. </text:p>
          </table:table-cell>
        </table:table-row>
      </table:table>
      <text:h text:style-name="P29" text:outline-level="2"/>
      <table:table table:name="Tabela8" table:style-name="Tabela8">
        <table:table-column table:style-name="Tabela8.A"/>
        <table:table-column table:style-name="Tabela8.B"/>
        <text:soft-page-break/>
        <table:table-row table:style-name="Tabela8.1">
          <table:table-cell table:style-name="Tabela8.A1" office:value-type="string">
            <text:list text:continue-numbering="true" text:style-name="WWNum1">
              <text:list-header>
                <text:p text:style-name="P150">Item</text:p>
              </text:list-header>
            </text:list>
          </table:table-cell>
          <table:table-cell table:style-name="Tabela8.B1" office:value-type="string">
            <text:list text:continue-numbering="true" text:style-name="WWNum1">
              <text:list-header>
                <text:p text:style-name="P151">Descrição</text:p>
              </text:list-header>
            </text:list>
          </table:table-cell>
        </table:table-row>
        <table:table-row>
          <table:table-cell table:style-name="Tabela8.A2" office:value-type="string">
            <text:list text:continue-numbering="true" text:style-name="WWNum1">
              <text:list-header>
                <text:p text:style-name="P79" loext:marker-style-name="T14"><text:span text:style-name="T14">O problema de</text:span></text:p>
              </text:list-header>
            </text:list>
          </table:table-cell>
          <table:table-cell table:style-name="Tabela8.B2" office:value-type="string">
            <text:list text:continue-numbering="true" text:style-name="WWNum1">
              <text:list-header>
                <text:p text:style-name="P153">Não existe um mecanismo eficiente que condicione o pagamento do frete à conclusão bem-sucedida da entrega, gerando riscos de prejuízo caso ocorram avarias ou descumprimento de contrato. </text:p>
              </text:list-header>
            </text:list>
          </table:table-cell>
        </table:table-row>
        <table:table-row>
          <table:table-cell table:style-name="Tabela8.A2" office:value-type="string">
            <text:list text:continue-numbering="true" text:style-name="WWNum1">
              <text:list-header>
                <text:p text:style-name="P79" loext:marker-style-name="T14"><text:span text:style-name="T14">Afeta</text:span></text:p>
              </text:list-header>
            </text:list>
          </table:table-cell>
          <table:table-cell table:style-name="Tabela8.B3" office:value-type="string">
            <text:list text:continue-numbering="true" text:style-name="WWNum1">
              <text:list-header>
                <text:p text:style-name="P154">Transportadores que temem não receber e contratantes <text:span text:style-name="T33">q</text:span>ue temem pagar por um serviço mal-executado. </text:p>
              </text:list-header>
            </text:list>
          </table:table-cell>
        </table:table-row>
        <table:table-row table:style-name="Tabela8.4">
          <table:table-cell table:style-name="Tabela8.A2" office:value-type="string">
            <text:list text:continue-numbering="true" text:style-name="WWNum1">
              <text:list-header>
                <text:p text:style-name="P79" loext:marker-style-name="T14"><text:span text:style-name="T14">Cujo impacto é</text:span></text:p>
              </text:list-header>
            </text:list>
          </table:table-cell>
          <table:table-cell table:style-name="Tabela8.B4" office:value-type="string">
            <text:list text:continue-numbering="true" text:style-name="WWNum1">
              <text:list-header>
                <text:p text:style-name="P154">Conflitos contratuais frequentes, prejuízos financeiros por cargas danificadas sem cobertura imediata e dificuldade em aplicar multas por atrasos. </text:p>
              </text:list-header>
            </text:list>
          </table:table-cell>
        </table:table-row>
        <table:table-row>
          <table:table-cell table:style-name="Tabela8.A5" office:value-type="string">
            <text:list text:continue-numbering="true" text:style-name="WWNum1">
              <text:list-header>
                <text:p text:style-name="P79" loext:marker-style-name="T14"><text:span text:style-name="T14">Benefícios de uma solução seriam</text:span></text:p>
              </text:list-header>
            </text:list>
          </table:table-cell>
          <table:table-cell table:style-name="Tabela8.B5" office:value-type="string">
            <text:list text:continue-numbering="true" text:style-name="WWNum1">
              <text:list-header>
                <text:p text:style-name="P154">Proteção financeira para ambas as partes através de um sistema de pagamento retido (escrow), liberação de valores apenas após a entrega confirmada e inclusão automática de seguro de carga. </text:p>
              </text:list-header>
            </text:list>
          </table:table-cell>
        </table:table-row>
      </table:table>
      <text:h text:style-name="P27" text:outline-level="2"/>
      <text:list text:continue-numbering="true" text:style-name="WWNum1">
        <text:list-header>
          <text:h text:style-name="P10" text:outline-level="2"><text:bookmark-start text:name="_Toc221199210"/><text:bookmark-start text:name="__RefHeading___Toc9215_3774562879"/>3 EQUIPE DO PROJETO<text:bookmark-end text:name="_Toc221199210"/><text:bookmark-end text:name="__RefHeading___Toc9215_3774562879"/></text:h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77">Matrícula</text:p>
          </table:table-cell>
          <table:table-cell table:style-name="Tabela3.B1" office:value-type="string">
            <text:p text:style-name="P77">Nome Completo</text:p>
          </table:table-cell>
          <table:table-cell table:style-name="Tabela3.C1" office:value-type="string">
            <text:p text:style-name="P77">Função no Projeto</text:p>
          </table:table-cell>
        </table:table-row>
        <table:table-row table:style-name="Tabela3.2">
          <table:table-cell table:style-name="Tabela3.A2" office:value-type="string">
            <text:p text:style-name="P57">2520616</text:p>
          </table:table-cell>
          <table:table-cell table:style-name="Tabela3.B2" office:value-type="string">
            <text:p text:style-name="P69"><text:span text:style-name="T13">Pedro Henrique </text:span><text:span text:style-name="T15">Silva</text:span></text:p>
          </table:table-cell>
          <table:table-cell table:style-name="Tabela3.C2" office:value-type="string">
            <text:p text:style-name="P57">L<text:span text:style-name="T34">í</text:span>der <text:span text:style-name="T35">de grupo</text:span> <text:span text:style-name="T34">e Back-end</text:span></text:p>
          </table:table-cell>
        </table:table-row>
        <table:table-row table:style-name="Tabela3.3">
          <table:table-cell table:style-name="Tabela3.A2" office:value-type="string">
            <text:p text:style-name="P57">2520781</text:p>
          </table:table-cell>
          <table:table-cell table:style-name="Tabela3.B3" office:value-type="string">
            <text:p text:style-name="P69"><text:span text:style-name="T13">Kauã Ferreira </text:span><text:span text:style-name="T15">Grande</text:span></text:p>
          </table:table-cell>
          <table:table-cell table:style-name="Tabela3.C3" office:value-type="string">
            <text:p text:style-name="P58"><text:span text:style-name="T35">Adm. de </text:span>Banco de dados <text:span text:style-name="T35">(DBA)</text:span></text:p>
          </table:table-cell>
        </table:table-row>
        <table:table-row table:style-name="Tabela3.4">
          <table:table-cell table:style-name="Tabela3.A4" office:value-type="string">
            <text:p text:style-name="P59">2520018</text:p>
          </table:table-cell>
          <table:table-cell table:style-name="Tabela3.A4" office:value-type="string">
            <text:p text:style-name="P59">Lucas Pereira Macedo</text:p>
          </table:table-cell>
          <table:table-cell table:style-name="Tabela3.C4" office:value-type="string">
            <text:p text:style-name="P69"><text:span text:style-name="T13">F</text:span><text:span text:style-name="T16">ormatador acadêmico </text:span><text:span text:style-name="T17">e Front-end</text:span></text:p>
          </table:table-cell>
        </table:table-row>
        <table:table-row table:style-name="Tabela3.5">
          <table:table-cell table:style-name="Tabela3.A2" office:value-type="string">
            <text:p text:style-name="P60">11195</text:p>
          </table:table-cell>
          <table:table-cell table:style-name="Tabela3.B5" office:value-type="string">
            <text:p text:style-name="P69"><text:span text:style-name="T13">Jeferson </text:span><text:span text:style-name="T15">Silva Araújo</text:span></text:p>
          </table:table-cell>
          <table:table-cell table:style-name="Tabela3.C5" office:value-type="string">
            <text:p text:style-name="P61">Orientador Principal</text:p>
          </table:table-cell>
        </table:table-row>
        <table:table-row table:style-name="Tabela3.5">
          <table:table-cell table:style-name="Tabela3.A2" office:value-type="string">
            <text:p text:style-name="P61"/>
          </table:table-cell>
          <table:table-cell table:style-name="Tabela3.B6" office:value-type="string">
            <text:p text:style-name="P59">Igor <text:span text:style-name="T36">Borges</text:span></text:p>
          </table:table-cell>
          <table:table-cell table:style-name="Tabela3.C6" office:value-type="string">
            <text:p text:style-name="P61">Orientador Secundário</text:p>
          </table:table-cell>
        </table:table-row>
      </table:table>
      <text:p text:style-name="P81"/>
      <text:list text:continue-numbering="true" text:style-name="WWNum1">
        <text:list-header>
          <text:h text:style-name="P10" text:outline-level="2"><text:bookmark-start text:name="__RefHeading___Toc9217_3774562879"/><text:bookmark-start text:name="_Toc221199211"/><text:soft-page-break/>4 REPOSITÓRIOS E ARTEFATOS DO PROJETO<text:bookmark-end text:name="__RefHeading___Toc9217_3774562879"/><text:bookmark-end text:name="_Toc221199211"/></text:h>
        </text:list-header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74" loext:marker-style-name="T5"><text:span text:style-name="T5">Tipo de Artefato</text:span><text:span text:style-name="T5"/></text:p>
          </table:table-cell>
          <table:table-cell table:style-name="Tabela4.B1" office:value-type="string">
            <text:p text:style-name="P74" loext:marker-style-name="T5"><text:span text:style-name="T5">Link</text:span><text:span text:style-name="T5"/></text:p>
          </table:table-cell>
          <table:table-cell table:style-name="Tabela4.C1" office:value-type="string">
            <text:p text:style-name="P74" loext:marker-style-name="T5"><text:span text:style-name="T5">Descrição</text:span><text:span text:style-name="T5"/></text:p>
          </table:table-cell>
        </table:table-row>
        <table:table-row table:style-name="Tabela4.2">
          <table:table-cell table:style-name="Tabela4.A2" office:value-type="string">
            <text:list text:continue-numbering="true" text:style-name="WWNum1">
              <text:list-header>
                <text:p text:style-name="P62">Repositório de Protótipo</text:p>
              </text:list-header>
            </text:list>
          </table:table-cell>
          <table:table-cell table:style-name="Tabela4.B2" office:value-type="string">
            <text:list text:continue-numbering="true" text:style-name="WWNum1">
              <text:list-header>
                <text:p text:style-name="P83"><text:a xlink:type="simple" xlink:href="https://www.figma.com/proto/MxTGymvkRAHnX7Sw3luGNn/Bloco---Pilot--AgroConnect-?node-id=180-69&amp;p=f&amp;t=EnzowFhWCFAERDpw-1&amp;scaling=scale-down&amp;content-scaling=fixed&amp;page-id=0%3A1&amp;starting-point-node-id=180%3A69&amp;show-proto-sidebar=1" text:style-name="Internet_20_link" text:visited-style-name="Visited_20_Internet_20_Link"><text:span text:style-name="T19">https://www.figma.com/proto/MxTGymvkRAHnX7Sw3luGNn/Bloco---Pilot--AgroConnect-?node-id=180-69&amp;p=f&amp;t=EnzowFhWCFAERDpw-1&amp;scaling=scale-down&amp;content-scaling=fixed&amp;page-id=0%3A1&amp;starting-point-node-id=180%3A69&amp;show-proto-sidebar=1</text:span></text:a></text:p>
              </text:list-header>
            </text:list>
          </table:table-cell>
          <table:table-cell table:style-name="Tabela4.C2" office:value-type="string">
            <text:p text:style-name="P55">Este artefato carrega o protótipo de <text:span text:style-name="T95">Alta</text:span> <text:span text:style-name="T95">F</text:span>idelidade do Projeto Pilot.</text:p>
          </table:table-cell>
        </table:table-row>
        <table:table-row table:style-name="Tabela4.3">
          <table:table-cell table:style-name="Tabela4.A2" office:value-type="string">
            <text:list text:continue-numbering="true" text:style-name="WWNum1">
              <text:list-header>
                <text:p text:style-name="P63">Repositório d<text:span text:style-name="T93">o Código Fonte</text:span></text:p>
              </text:list-header>
            </text:list>
          </table:table-cell>
          <table:table-cell table:style-name="Tabela4.B3" office:value-type="string">
            <text:p text:style-name="P84"><text:a xlink:type="simple" xlink:href="https://github.com/lucaspmacedo/AgroConnect---Bloco-Pilot/blob/main/BlocoPilot/Código_Fonte.py" text:style-name="Internet_20_link" text:visited-style-name="Visited_20_Internet_20_Link"><text:span text:style-name="T32">https://github.com/lucaspmacedo/AgroConnect---Bloco-Pilot/blob/main/BlocoPilot/C%C3%B3digo_Fonte.py</text:span></text:a></text:p>
          </table:table-cell>
          <table:table-cell table:style-name="Tabela4.C3" office:value-type="string">
            <text:list text:continue-numbering="true" text:style-name="WWNum1">
              <text:list-header>
                <text:p text:style-name="P56"><text:span text:style-name="T92">Este artefato carrega o </text:span><text:span text:style-name="T91">código </text:span><text:span text:style-name="T92">do Projeto Pilot.</text:span></text:p>
              </text:list-header>
            </text:list>
          </table:table-cell>
        </table:table-row>
        <table:table-row table:style-name="Tabela4.4">
          <table:table-cell table:style-name="Tabela4.A2" office:value-type="string">
            <text:p text:style-name="P78" loext:marker-style-name="T21"><text:span text:style-name="T21"/></text:p>
          </table:table-cell>
          <table:table-cell table:style-name="Tabela4.B4" office:value-type="string">
            <text:p text:style-name="P80"/>
          </table:table-cell>
          <table:table-cell table:style-name="Tabela4.C4" office:value-type="string">
            <text:p text:style-name="P80"/>
          </table:table-cell>
        </table:table-row>
      </table:table>
      <text:h text:style-name="P15" text:outline-level="2"/>
      <text:p text:style-name="P43"/>
      <text:h text:style-name="P36" text:outline-level="1"><text:bookmark-start text:name="__RefHeading___Toc14297_3774562879"/><text:bookmark-start text:name="_Toc221199212"/>PARTE 02 – PLANEJAMENTO DO SEMESTRE<text:bookmark-end text:name="__RefHeading___Toc14297_3774562879"/><text:bookmark-end text:name="_Toc221199212"/></text:h>
      <text:list text:continue-numbering="true" text:style-name="WWNum1">
        <text:list-header>
          <text:h text:style-name="P12" text:outline-level="2"><text:bookmark-start text:name="_Toc221199213"/><text:bookmark-start text:name="__RefHeading___Toc2537_3781650801"/><text:span text:style-name="T38">5 SITUAÇÃO ATUAL DO PROJETO</text:span><text:bookmark-end text:name="_Toc221199213"/><text:span text:style-name="T39"> </text:span><text:bookmark-end text:name="__RefHeading___Toc2537_3781650801"/></text:h>
          <text:p text:style-name="P166">Atualmente, o projeto encontra-se na conclusão da Fase 02 do 2º Período, com o documento de especificação atualizado para a Versão 2.2.1. <text:span text:style-name="T88">Passamos</text:span> a etapa puramente conceptual da fase anterior, tendo concluído com êxito a pesquisa de campo com <text:span text:style-name="T87">4</text:span> participantes estratégicos da região de Anápolis, incluindo motoristas autônomos, produtor rura<text:span text:style-name="T87">l</text:span> e comerciante local de retalho de insumos. Esta etapa de validação permitiu refinar os requisitos de usabilidade (RNF-003) e confirmar a viabilidade do mecanismo de <text:span text:style-name="T55">escrow</text:span> logístico como solução para a insegurança financeira no setor. Em termos técnicos, a modelagem avançou com a elaboração <text:span text:style-name="T59">dos Diagramas de Casos de Uso e de Classes, consolidando a lógica de herança de utilizadores, o tratamento de ocorrências e a integração com o seguro obrigatório. A </text:span><text:soft-page-break/><text:span text:style-name="T59">equip</text:span><text:span text:style-name="T62">e</text:span><text:span text:style-name="T59"> mantém uma gestão ativa através do método Kanban, com as tarefas distribuídas conforme as competências de cada integrante (Lucas na documentação/pesquisa, Pedro no protótipo e Kauã na modelagem), preparando a base necessária para as futuras etapas de implementação de código .</text:span></text:p>
        </text:list-header>
      </text:list>
      <text:h text:style-name="P41" text:outline-level="1"/>
      <text:list text:continue-numbering="true" text:style-name="WWNum1">
        <text:list-header>
          <text:h text:style-name="P10" text:outline-level="2"><text:bookmark-start text:name="_Toc221199214"/><text:bookmark-start text:name="__RefHeading___Toc9225_3774562879"/>6 OBJETIVOS DO SEMESTRE<text:bookmark-end text:name="_Toc221199214"/><text:bookmark-end text:name="__RefHeading___Toc9225_3774562879"/></text:h>
          <text:p text:style-name="P168"><text:bookmark text:name="p-rc_5eb154344b870545-152"/><text:bookmark-start text:name="__RefHeading___Toc9227_3774562879"/><text:span text:style-name="T45">Os objetivos deste semestre focam em consolidar a base estrutural e lógica do Bloco PILOT, preparando o caminho para a futura implementação técnica. Como estamos</text:span><text:span text:style-name="T55"> </text:span><text:span text:style-name="T43">no segundo período de Engenharia de Software, as metas priorizam a arquitetura e a experiência do usuário, garantindo a viabilidade do projeto </text:span><text:span text:style-name="T44">como:</text:span><text:bookmark-end text:name="__RefHeading___Toc9227_3774562879"/></text:p>
          <text:p text:style-name="P156"><text:bookmark text:name="p-rc_5eb154344b870545-153"/><text:bookmark-start text:name="__RefHeading___Toc9229_3774562879"/>Validação de Requisitos: Refinar os requisitos funcionais e as regras de negócio, como o matching inteligente de cargas e a "Regra de Ouro" para liberação de pagamentos.<text:bookmark-end text:name="__RefHeading___Toc9229_3774562879"/></text:p>
          <text:p text:style-name="P156"><text:bookmark text:name="p-rc_5eb154344b870545-154"/><text:bookmark-start text:name="__RefHeading___Toc9231_3774562879"/><text:span text:style-name="T27">Aprimoramento da Prototipação: Evoluir os wireframes de baixa fidelidade para validar fluxos críticos, como o </text:span><text:span text:style-name="T28">escrow </text:span><text:span text:style-name="T27">logístico e a comprovação digital de entrega.</text:span><text:bookmark-end text:name="__RefHeading___Toc9231_3774562879"/></text:p>
          <text:p text:style-name="P156"><text:bookmark text:name="p-rc_5eb154344b870545-155"/><text:bookmark-start text:name="__RefHeading___Toc9233_3774562879"/>Planejamento da Arquitetura: Definir a estrutura modular em microserviços para assegurar a independência do Bloco PILOT em relação ao Bloco ARCHER.<text:bookmark-end text:name="__RefHeading___Toc9233_3774562879"/></text:p>
          <text:p text:style-name="P156"><text:bookmark text:name="p-rc_5eb154344b870545-156"/><text:bookmark-start text:name="__RefHeading___Toc9235_3774562879"/>Simulação de Lógica: Testar teoricamente o algoritmo de matching baseado em localização, veículo e rota, além da validação automática de seguros obrigatórios.<text:bookmark-end text:name="__RefHeading___Toc9235_3774562879"/></text:p>
          <text:p text:style-name="P156"><text:bookmark text:name="p-rc_5eb154344b870545-157"/><text:bookmark-start text:name="__RefHeading___Toc9237_3774562879"/>Coleta de Feedback: Apresentar os fluxos desenhados a usuários potenciais para ajustar a usabilidade e mitigar riscos financeiros antes da codificação.<text:bookmark-end text:name="__RefHeading___Toc9237_3774562879"/></text:p>
        </text:list-header>
      </text:list>
      <text:p text:style-name="P52"/>
      <text:list text:continue-numbering="true" text:style-name="WWNum1">
        <text:list-header>
          <text:h text:style-name="P10" text:outline-level="2"><text:bookmark-start text:name="_Toc221199215"/><text:bookmark-start text:name="__RefHeading___Toc9239_3774562879"/><text:soft-page-break/>7 CRONOGRAMA DO SEMESTRE<text:bookmark-end text:name="_Toc221199215"/><text:bookmark-end text:name="__RefHeading___Toc9239_3774562879"/></text:h>
        </text:list-header>
      </text:list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76" loext:marker-style-name="T5"><text:span text:style-name="T5">Mês</text:span></text:p>
          </table:table-cell>
          <table:table-cell table:style-name="Tabela19.B1" office:value-type="string">
            <text:p text:style-name="P76" loext:marker-style-name="T5"><text:span text:style-name="T5">Atividade</text:span></text:p>
          </table:table-cell>
          <table:table-cell table:style-name="Tabela19.C1" office:value-type="string">
            <text:p text:style-name="P75" loext:marker-style-name="T5"><text:span text:style-name="T5">Descrição </text:span><text:span text:style-name="T6">da Eta</text:span><text:span text:style-name="T7">pa</text:span></text:p>
          </table:table-cell>
        </table:table-row>
        <table:table-row table:style-name="Tabela19.1">
          <table:table-cell table:style-name="Tabela19.A2" office:value-type="string">
            <text:list text:continue-numbering="true" text:style-name="WWNum1">
              <text:list-header>
                <text:p text:style-name="P64">Fevereir<text:span text:style-name="T57">o</text:span></text:p>
              </text:list-header>
            </text:list>
          </table:table-cell>
          <table:table-cell table:style-name="Tabela19.B2" office:value-type="string">
            <text:list text:continue-numbering="true" text:style-name="WWNum1">
              <text:list-header>
                <text:p text:style-name="P157"><text:bookmark-start text:name="__RefHeading___Toc9219_3774562879 Copia 1"/>Análise de Problemas e Planejamento <text:bookmark-end text:name="__RefHeading___Toc9219_3774562879 Copia 1"/></text:p>
              </text:list-header>
            </text:list>
          </table:table-cell>
          <table:table-cell table:style-name="Tabela19.C2" office:value-type="string">
            <text:p text:style-name="P65">Definição do escopo do Bloco Pilot, identificação de problemas reais no frete rural e elaboração do planejamento inicial. </text:p>
          </table:table-cell>
        </table:table-row>
        <table:table-row table:style-name="Tabela19.1">
          <table:table-cell table:style-name="Tabela19.A2" office:value-type="string">
            <text:p text:style-name="P66">Março</text:p>
          </table:table-cell>
          <table:table-cell table:style-name="Tabela19.B3" office:value-type="string">
            <text:p text:style-name="P67">Requisitos e Design (Fase 01) </text:p>
          </table:table-cell>
          <table:table-cell table:style-name="Tabela19.C3" office:value-type="string">
            <text:p text:style-name="P68">Levantamento de RF/RNF, criação de regras de negócio e desenvolvimento do protótipo de baixa fidelidade no Figma </text:p>
          </table:table-cell>
        </table:table-row>
        <table:table-row table:style-name="Tabela19.1">
          <table:table-cell table:style-name="Tabela19.A2" office:value-type="string">
            <text:p text:style-name="P66">Abril</text:p>
          </table:table-cell>
          <table:table-cell table:style-name="Tabela19.B4" office:value-type="string">
            <text:p text:style-name="P67">Pesquisa e Refinamento (Fase 02) </text:p>
          </table:table-cell>
          <table:table-cell table:style-name="Tabela19.C4" office:value-type="string">
            <text:p text:style-name="P68">Realização de pesquisa com usuários(transportadores/ embarcadores) e ajustes no design com base no feedback recebido. </text:p>
          </table:table-cell>
        </table:table-row>
        <table:table-row table:style-name="Tabela19.1">
          <table:table-cell table:style-name="Tabela19.A2" office:value-type="string">
            <text:p text:style-name="P66">Maio</text:p>
          </table:table-cell>
          <table:table-cell table:style-name="Tabela19.B5" office:value-type="string">
            <text:p text:style-name="P67">Modelagem e Gestão </text:p>
          </table:table-cell>
          <table:table-cell table:style-name="Tabela19.C5" office:value-type="string">
            <text:p text:style-name="P68">Elaboração de diagramas iniciais do sistema e organização da gestão do projeto seguindo práticas ágeis. </text:p>
          </table:table-cell>
        </table:table-row>
        <table:table-row table:style-name="Tabela19.1">
          <table:table-cell table:style-name="Tabela19.A2" office:value-type="string">
            <text:p text:style-name="P66">Junho</text:p>
          </table:table-cell>
          <table:table-cell table:style-name="Tabela19.B6" office:value-type="string">
            <text:p text:style-name="P67">Consolidação e Entrega Final </text:p>
          </table:table-cell>
          <table:table-cell table:style-name="Tabela19.C6" office:value-type="string">
            <text:p text:style-name="P68">Revisão completa do Documento de Especificação e preparação para a apresentação dos resultados do semestre. </text:p>
          </table:table-cell>
        </table:table-row>
      </table:table>
      <text:list text:continue-numbering="true" text:style-name="WWNum1">
        <text:list-header>
          <text:p text:style-name="P71"/>
        </text:list-header>
      </text:list>
      <text:h text:style-name="P39" text:outline-level="1" loext:marker-style-name="T23"><text:bookmark-start text:name="_Toc221199216"/><text:bookmark-start text:name="__RefHeading___Toc18047_3774562879"/>PARTE 03 – ENTENDIMENTO DO PÚBLICO, DO NEGÓCIO E LEVANTAMENTO INICIAL DE REQUISITOS<text:bookmark-end text:name="_Toc221199216"/><text:bookmark-end text:name="__RefHeading___Toc18047_3774562879"/></text:h>
      <text:h text:style-name="P40" text:outline-level="1" loext:marker-style-name="T23"/>
      <text:list text:continue-numbering="true" text:style-name="WWNum1">
        <text:list-header>
          <text:h text:style-name="P10" text:outline-level="2"><text:bookmark-start text:name="__RefHeading___Toc18049_3774562879"/>8 PÚBLICO-ALVO DO PRODUTO<text:bookmark-end text:name="__RefHeading___Toc18049_3774562879"/></text:h>
          <text:p text:style-name="P158">O público-alvo do <text:span text:style-name="T59">AgroConnect - Bloco PILOT é composto por dois perfis principais que atuam diretamente na movimentação física de produtos no campo. </text:span></text:p>
          <text:p text:style-name="P159">O primeiro perfil é o do Transportador, que inclui desde caminhoneiros autônomos de grande carga até pequenas empresas transportadoras que realizam a distribuição de "última milha". Para eles, o aplicativo serve como uma ferramenta de trabalho para encontrar fretes verificados, gerenciar rotas e garantir o recebimento seguro do pagamento após a entrega. </text:p>
          <text:p text:style-name="P159"><text:span text:style-name="T59">O segundo perfil engloba os Contratantes de Frete, representados por produtores rurais de agricultura e pecuária, além de empresas com</text:span>pradoras como frigoríficos e agroindústrias. Estes usuários utilizam o sistema para buscar transporte confiável, monitorar o status das mercadorias em tempo real e mitigar riscos de perdas através <text:soft-page-break/>do seguro obrigatório integrado. O contexto de uso ocorre no dia a dia da operação rural, onde a necessidade de escoar a produção com agilidade e segurança financeira é fundamental para a viabilidade do negócio. </text:p>
          <text:p text:style-name="P159"/>
          <text:h text:style-name="P10" text:outline-level="2"><text:bookmark-start text:name="_Toc221199218"/><text:bookmark-start text:name="__RefHeading___Toc9243_3774562879"/>9 CONTEXTO DE NEGÓCIO<text:bookmark-end text:name="_Toc221199218"/><text:bookmark-end text:name="__RefHeading___Toc9243_3774562879"/></text:h>
          <text:p text:style-name="P158"><text:bookmark-start text:name="__RefHeading___Toc9245_3774562879"/>O AgroConnect opera<text:span text:style-name="T64">rá</text:span> no contexto do agronegócio brasileiro, um setor vital para a economia, responsável por cerca de 25% do PIB nacional, mas repleto de desafios logísticos e financeiros. No Bloco PILOT, focamos na logística de transporte de cargas agropecuárias, onde problemas como inadimplência, atrasos em entregas, roubo de cargas e falta de verificação de transportadores geram perdas anuais estimadas em bilhões de reais. Por exemplo, o transporte rodoviário domina o setor (cerca de 60% das cargas), mas sofre com baixa conectividade em áreas rurais, familiaridade digital limitada entre caminhoneiros e riscos operacionais como avarias ou sinistros. <text:bookmark-end text:name="__RefHeading___Toc9245_3774562879"/></text:p>
          <text:p text:style-name="P159"><text:bookmark-start text:name="__RefHeading___Toc9247_3774562879"/><text:span text:style-name="T58">O negócio visa conectar produtores, compradores e transportadores de forma segura, reduzindo esses riscos por meio de matching inteligente, monitoramento em tempo real e escrow logístico, que retém pagamentos até a confirmação de entrega. Isso alinha-se à “Realidade do Agro”, com suporte offline-first para regiões remotas, e integra</text:span><text:span text:style-name="T63">r</text:span><text:span text:style-name="T58">-se ao Bloco ARCHER para garantias comerciais. O modelo de negócio é baseado em taxas por transação (ex.: comissão por frete), com potencial de escalabilidade de regional (foco inicial em Goiás) para nacional, explorando parcerias com seguradoras e centros de distribuição. Competidores como plataformas de fretes genéricas existem, mas faltam integração financeira operacional e foco no agro, criando uma oportunidade para o AgroConnect inovar em proteção contra falhas logísticas e aumentar a eficiência da cadeia de suprimentos.</text:span><text:bookmark-end text:name="__RefHeading___Toc9247_3774562879"/></text:p>
          <text:p text:style-name="P180"/>
          <text:h text:style-name="P10" text:outline-level="2"><text:bookmark-start text:name="_Toc221199219"/><text:bookmark-start text:name="__RefHeading___Toc9249_3774562879"/>10 SOLUÇÕES EXISTENTES<text:bookmark-end text:name="_Toc221199219"/><text:bookmark-end text:name="__RefHeading___Toc9249_3774562879"/></text:h>
          <text:p text:style-name="P158"><text:bookmark-start text:name="__RefHeading___Toc9251_3774562879"/>Atualmente, o transporte de cargas é realizado utilizando diferentes tipos de soluções, que incluem plataformas digitais de frete, sistemas de gestão logística e <text:soft-page-break/>também métodos mais tradicionais. As plataformas digitais permitem conectar empresas que precisam transportar mercadorias com caminhoneiros ou transportadoras disponíveis, facilitando a contratação e a comunicação entre as partes.<text:bookmark-end text:name="__RefHeading___Toc9251_3774562879"/></text:p>
          <text:p text:style-name="P159"><text:bookmark-start text:name="__RefHeading___Toc9253_3774562879"/><text:span text:style-name="T9">Já os sistemas de gestão logística são utilizados principalmente por</text:span><text:span text:style-name="T10"> </text:span><text:span text:style-name="T9">empresas para planejar rotas, acompanhar entregas e organizar as operações de transporte. Apesar dessas soluções contribuírem para melhorar a organização da logística, muitas ainda apresentam limitações importantes, entre elas estão a verificação limitada dos transportadores, pouca integração com seguros de carga e a ausência de mecanismos que garantam maior segurança financeira nas operações.</text:span><text:bookmark-end text:name="__RefHeading___Toc9253_3774562879"/></text:p>
          <text:p text:style-name="P160"><text:bookmark-start text:name="__RefHeading___Toc9255_3774562879"/>Além disso, em alguns casos o controle das entregas ainda depende de processos manuais, como planilhas ou contatos diretos entre empresas e motoristas. Essas limitações indicam que ainda existem oportunidades para o desenvolvimento de soluções mais completas, capazes de integrar monitoramento, validação de transportadores e maior segurança nas transações logísticas.<text:bookmark-end text:name="__RefHeading___Toc9255_3774562879"/></text:p>
          <text:h text:style-name="P16" text:outline-level="2"/>
          <text:h text:style-name="P10" text:outline-level="2"><text:bookmark-start text:name="__RefHeading___Toc2207_1037354077"/>11 PESQUISA COM USUÁRIOS<text:bookmark-end text:name="__RefHeading___Toc2207_1037354077"/></text:h>
          <text:p text:style-name="P169">Nesta etapa do projeto, realizamos uma pesquisa de campo para validar as hipóteses levantadas na fase de concepção do AgroConnect - Bloco Pilot. A abordagem foi mista, combinando dados quantitativos para identificar padrões e qualitativos para aprofundar a compreensão das dores dos usuários. A amostra foi composta por <text:span text:style-name="T79">4</text:span> participantes selecionados estrategicamente na região de Anápolis.</text:p>
          <text:p text:style-name="P170">Participante 1: Motorista autônomo <text:span text:style-name="T79">com 56 anos de idade </text:span><text:span text:style-name="T80">com</text:span><text:span text:style-name="T79"> quase 20 anos na profissão,</text:span> focado na rota Anápolis - Goiânia. </text:p>
          <text:p text:style-name="P170">Participante 2: Pequeno produtor rural <text:span text:style-name="T79">com 56 anos de idade,</text:span> da região de <text:span text:style-name="T79">Gameleira </text:span>de Goiás. </text:p>
          <text:p text:style-name="P170">Participante <text:span text:style-name="T79">3</text:span>: Caminhoneiro<text:span text:style-name="T79"> </text:span>de longa distância (Bitrem), <text:span text:style-name="T79">com 35 anos de idade, </text:span>que utiliza a BR-153. </text:p>
          <text:p text:style-name="P170"><text:soft-page-break/>Participante <text:span text:style-name="T79">4</text:span>: Proprietário de uma <text:span text:style-name="T59">"Casa de Ração</text:span><text:span text:style-name="T78">"</text:span> de pequeno porte em Anápolis, focado no varejo de nutrição animal. </text:p>
          <text:p text:style-name="P170">Os instrumentos utilizados foram um questionário estruturado de 10 perguntas e um roteiro de entrevista com 7 questões abertas, aplicados de forma presencial.</text:p>
          <text:p text:style-name="P170"/>
          <text:h text:style-name="P10" text:outline-level="2"><text:bookmark-start text:name="__RefHeading___Toc2209_1037354077"/>12 RESULTADOS DE PESQUISA COM USUÁRIO<text:bookmark-end text:name="__RefHeading___Toc2209_1037354077"/></text:h>
          <text:p text:style-name="P171">Os resultados da pesquisa confirmaram a viabilidade do produto e geraram <text:span text:style-name="T81">percepções </text:span><text:s/>para o refinamento da solução. O ponto de maior convergência entre os entrevistados foi a insegurança financeira, validando a proposta do Escrow Logístico. </text:p>
          <text:p text:style-name="P172">Garantia de Pagamento: 100% dos motoristas entrevistados relataram já ter sofrido atrasos ou "calotes" em fretes informais. </text:p>
          <text:p text:style-name="P172">Conectividade Rural: Todos os participantes destacaram a precariedade do sinal de internet em fazendas, tornando o requisito de funcionamento offline (RNF-003) uma necessidade crítica de sobrevivência do app. </text:p>
          <text:p text:style-name="P172">Seguro Obrigatório: O produtor rural enfatiz<text:span text:style-name="T81">ou</text:span> que a ativação automática do seguro (RNE-002) é o fator que os faria migrar de métodos tradicionais para o AgroConnect. </text:p>
          <text:p text:style-name="P172">Informalidade no "Last Mile": O comerciante relatou que suas entregas são feitas por motoristas informais sem nenhum tipo de contrato ou rastreamento.</text:p>
          <text:p text:style-name="P173">Dependência de Estoque: A falta de previsão de chegada da carga (ração/insumos) causa perda de vendas, validando a importância do RF-003 (Monitoramento em Tempo Real).</text:p>
          <text:p text:style-name="P173">Impacto no Design e Requisitos: A partir dos feedbacks, o grupo realizou ajustes diretos na modelagem e nos protótipos:</text:p>
        </text:list-header>
      </text:list>
      <text:h text:style-name="P72" text:outline-level="2"/>
      <table:table table:name="Tabela20" table:style-name="Tabela20">
        <table:table-column table:style-name="Tabela20.A"/>
        <table:table-column table:style-name="Tabela20.B"/>
        <table:table-column table:style-name="Tabela20.C"/>
        <text:soft-page-break/>
        <table:table-row table:style-name="Tabela20.1">
          <table:table-cell table:style-name="Tabela20.A1" office:value-type="string">
            <text:list text:continue-numbering="true" text:style-name="WWNum1">
              <text:list-header>
                <text:p text:style-name="P181">Percepção Identificada</text:p>
              </text:list-header>
            </text:list>
          </table:table-cell>
          <table:table-cell table:style-name="Tabela20.B1" office:value-type="string">
            <text:list text:continue-numbering="true" text:style-name="WWNum1">
              <text:list-header>
                <text:p text:style-name="P182">Ajuste Realizado no Projeto</text:p>
              </text:list-header>
            </text:list>
          </table:table-cell>
          <table:table-cell table:style-name="Tabela20.C1" office:value-type="string">
            <text:list text:continue-numbering="true" text:style-name="WWNum1">
              <text:list-header>
                <text:p text:style-name="P181">Requisito Impactado</text:p>
              </text:list-header>
            </text:list>
          </table:table-cell>
        </table:table-row>
        <table:table-row table:style-name="Tabela20.2">
          <table:table-cell table:style-name="Tabela20.A2" office:value-type="string">
            <text:list text:continue-numbering="true" text:style-name="WWNum1">
              <text:list-header>
                <text:p text:style-name="P183"><text:span text:style-name="T82">Os </text:span>Motoristas relataram dificuldade em ler texto<text:span text:style-name="T82">s </text:span>pequenos enquanto estão no pátio de carga.</text:p>
              </text:list-header>
            </text:list>
          </table:table-cell>
          <table:table-cell table:style-name="Tabela20.B2" office:value-type="string">
            <text:list text:continue-numbering="true" text:style-name="WWNum1">
              <text:list-header>
                <text:p text:style-name="P184"><text:bookmark-start text:name="__RefHeading___Toc9219_3774562879 Copia 1 Copia 1"/>Aumento da hierarquia visual e dos botões de ação na tela de "Confirmar Entrega".<text:bookmark-end text:name="__RefHeading___Toc9219_3774562879 Copia 1 Copia 1"/></text:p>
              </text:list-header>
            </text:list>
          </table:table-cell>
          <table:table-cell table:style-name="Tabela20.C2" office:value-type="string">
            <text:list text:continue-numbering="true" text:style-name="WWNum1">
              <text:list-header>
                <text:p text:style-name="P186">RNF-003</text:p>
              </text:list-header>
            </text:list>
          </table:table-cell>
        </table:table-row>
        <table:table-row table:style-name="Tabela20.3">
          <table:table-cell table:style-name="Tabela20.A2" office:value-type="string">
            <text:list text:continue-numbering="true" text:style-name="WWNum1">
              <text:list-header>
                <text:p text:style-name="P183">Receio com o envio de documentos sensíveis por meios digitais.</text:p>
              </text:list-header>
            </text:list>
          </table:table-cell>
          <table:table-cell table:style-name="Tabela20.B3" office:value-type="string">
            <text:list text:continue-numbering="true" text:style-name="WWNum1">
              <text:list-header>
                <text:p text:style-name="P184">Reforço na descrição do requisito de proteção e sigilo de dados cadastrais.</text:p>
              </text:list-header>
            </text:list>
          </table:table-cell>
          <table:table-cell table:style-name="Tabela20.C3" office:value-type="string">
            <text:list text:continue-numbering="true" text:style-name="WWNum1">
              <text:list-header>
                <text:p text:style-name="P185">RNF-002</text:p>
              </text:list-header>
            </text:list>
          </table:table-cell>
        </table:table-row>
        <table:table-row table:style-name="Tabela20.4">
          <table:table-cell table:style-name="Tabela20.A2" office:value-type="string">
            <text:list text:continue-numbering="true" text:style-name="WWNum1">
              <text:list-header>
                <text:p text:style-name="P183">O comerciante pequeno tem pouco tempo e precisa de avisos rápidos no celular.</text:p>
              </text:list-header>
            </text:list>
          </table:table-cell>
          <table:table-cell table:style-name="Tabela20.B4" office:value-type="string">
            <text:list text:continue-numbering="true" text:style-name="WWNum1">
              <text:list-header>
                <text:p text:style-name="P184">Criação de Notificações Push automáticas para cada mudança de status da carga (Saiu para entrega/Próximo ao destino).</text:p>
              </text:list-header>
            </text:list>
          </table:table-cell>
          <table:table-cell table:style-name="Tabela20.C4" office:value-type="string">
            <text:list text:continue-numbering="true" text:style-name="WWNum1">
              <text:list-header>
                <text:p text:style-name="P185">RF-003</text:p>
              </text:list-header>
            </text:list>
          </table:table-cell>
        </table:table-row>
        <table:table-row table:style-name="Tabela20.5">
          <table:table-cell table:style-name="Tabela20.A2" office:value-type="string">
            <text:list text:continue-numbering="true" text:style-name="WWNum1">
              <text:list-header>
                <text:p text:style-name="P183">Medo de receber mercadoria avariada (sacos de ração rasgados) e já ter pago o frete.</text:p>
              </text:list-header>
            </text:list>
          </table:table-cell>
          <table:table-cell table:style-name="Tabela20.B5" office:value-type="string">
            <text:list text:continue-numbering="true" text:style-name="WWNum1">
              <text:list-header>
                <text:p text:style-name="P184">Reforço da regra de Escrow, permitindo que o comerciante vistorie a carga antes de confirmar a entrega no app.</text:p>
              </text:list-header>
            </text:list>
          </table:table-cell>
          <table:table-cell table:style-name="Tabela20.C5" office:value-type="string">
            <text:list text:continue-numbering="true" text:style-name="WWNum1">
              <text:list-header>
                <text:p text:style-name="P185">RNE-001</text:p>
              </text:list-header>
            </text:list>
          </table:table-cell>
        </table:table-row>
        <table:table-row table:style-name="Tabela20.6">
          <table:table-cell table:style-name="Tabela20.A2" office:value-type="string">
            <text:list text:continue-numbering="true" text:style-name="WWNum1">
              <text:list-header>
                <text:p text:style-name="P183">Dificuldade em gerenciar múltiplos pedidos pequenos de fornecedores diferentes.</text:p>
              </text:list-header>
            </text:list>
          </table:table-cell>
          <table:table-cell table:style-name="Tabela20.B6" office:value-type="string">
            <text:list text:continue-numbering="true" text:style-name="WWNum1">
              <text:list-header>
                <text:p text:style-name="P184">A implementação de filtros e listas organizadas é uma função direta da gestão de dados do transporte.</text:p>
              </text:list-header>
            </text:list>
          </table:table-cell>
          <table:table-cell table:style-name="Tabela20.C6" office:value-type="string">
            <text:list text:continue-numbering="true" text:style-name="WWNum1">
              <text:list-header>
                <text:p text:style-name="P185">RF-00<text:span text:style-name="T96">2</text:span></text:p>
              </text:list-header>
            </text:list>
          </table:table-cell>
        </table:table-row>
      </table:table>
      <text:list text:continue-numbering="true" text:style-name="WWNum1">
        <text:list-header>
          <text:p text:style-name="P167"/>
          <text:p text:style-name="P167">Os dados coletados serviram como insumo para garantir que o sistema não seja apenas uma ferramenta tecnológica, mas uma solução que atenda às limitações reais do ambiente de trânsito e do cotidiano rural.</text:p>
          <text:p text:style-name="P177"/>
          <text:h text:style-name="P10" text:outline-level="2"><text:bookmark-start text:name="__RefHeading___Toc9257_3774562879"/><text:bookmark-start text:name="_Toc221199222"/><text:soft-page-break/>13 REGRAS DE NEGÓCIO<text:bookmark-end text:name="__RefHeading___Toc9257_3774562879"/><text:bookmark-end text:name="_Toc221199222"/></text:h>
        </text:list-header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46" loext:marker-style-name="T3"><text:span text:style-name="T3">ID</text:span></text:p>
          </table:table-cell>
          <table:table-cell table:style-name="Tabela5.A1" office:value-type="string">
            <text:p text:style-name="P146" loext:marker-style-name="T3"><text:span text:style-name="T3">Descrição</text:span></text:p>
          </table:table-cell>
          <table:table-cell table:style-name="Tabela5.A1" office:value-type="string">
            <text:p text:style-name="P146" loext:marker-style-name="T3"><text:span text:style-name="T3">Requisitos Relacionados</text:span></text:p>
          </table:table-cell>
        </table:table-row>
        <table:table-row table:style-name="Tabela5.2">
          <table:table-cell table:style-name="Tabela5.A2" office:value-type="string">
            <text:p text:style-name="P124">RNE-001 </text:p>
          </table:table-cell>
          <table:table-cell table:style-name="Tabela5.B2" office:value-type="string">
            <text:p text:style-name="P135">Pagamento <text:span text:style-name="T97">via </text:span><text:span text:style-name="T99">Es</text:span><text:span text:style-name="T97">crow</text:span></text:p>
          </table:table-cell>
          <table:table-cell table:style-name="Tabela5.C2" office:value-type="string">
            <text:p text:style-name="P130">RF-004 (Proc. de Pagamento)</text:p>
          </table:table-cell>
        </table:table-row>
        <table:table-row table:style-name="Tabela5.3">
          <table:table-cell table:style-name="Tabela5.A3" table:number-columns-spanned="3" office:value-type="string">
            <text:p text:style-name="P141"><text:span text:style-name="T48">Detalhamento: </text:span><text:span text:style-name="T50">O valor do frete só é libertado após a confirmação digital de entrega sem avarias.</text:span>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47" loext:marker-style-name="T3"><text:span text:style-name="T3">ID</text:span></text:p>
          </table:table-cell>
          <table:table-cell table:style-name="Tabela9.A1" office:value-type="string">
            <text:p text:style-name="P147" loext:marker-style-name="T3"><text:span text:style-name="T3">Descrição</text:span></text:p>
          </table:table-cell>
          <table:table-cell table:style-name="Tabela9.A1" office:value-type="string">
            <text:p text:style-name="P147" loext:marker-style-name="T3"><text:span text:style-name="T3">Requisitos Relacionados</text:span></text:p>
          </table:table-cell>
        </table:table-row>
        <table:table-row table:style-name="Tabela9.2">
          <table:table-cell table:style-name="Tabela9.A2" office:value-type="string">
            <text:p text:style-name="P125">RNE-00<text:span text:style-name="T71">2</text:span></text:p>
          </table:table-cell>
          <table:table-cell table:style-name="Tabela9.B2" office:value-type="string">
            <text:p text:style-name="P136">Seguro <text:span text:style-name="T72">o</text:span>brigatóri<text:span text:style-name="T97">o</text:span></text:p>
          </table:table-cell>
          <table:table-cell table:style-name="Tabela9.C2" office:value-type="string">
            <text:p text:style-name="P137"><text:span text:style-name="T45"><text:s/></text:span><text:s/>RF-005 (Gestão de Sinistros)</text:p>
          </table:table-cell>
        </table:table-row>
        <table:table-row table:style-name="Tabela9.3">
          <table:table-cell table:style-name="Tabela9.A3" table:number-columns-spanned="3" office:value-type="string">
            <text:p text:style-name="P138"><text:span text:style-name="T46">Detalhamento:</text:span><text:span text:style-name="T45"> Nenhuma carga pode ser alocada a um transportador sem uma apólice de seguro ativa e validada.</text:span>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47" loext:marker-style-name="T3"><text:span text:style-name="T3">ID</text:span></text:p>
          </table:table-cell>
          <table:table-cell table:style-name="Tabela10.A1" office:value-type="string">
            <text:p text:style-name="P147" loext:marker-style-name="T3"><text:span text:style-name="T3">Descrição</text:span></text:p>
          </table:table-cell>
          <table:table-cell table:style-name="Tabela10.A1" office:value-type="string">
            <text:p text:style-name="P147" loext:marker-style-name="T3"><text:span text:style-name="T3">Requisitos Relacionados</text:span></text:p>
          </table:table-cell>
        </table:table-row>
        <table:table-row table:style-name="Tabela10.2">
          <table:table-cell table:style-name="Tabela10.A2" office:value-type="string">
            <text:p text:style-name="P122"><text:span text:style-name="T65">RNE-00</text:span><text:span text:style-name="T67">3</text:span></text:p>
          </table:table-cell>
          <table:table-cell table:style-name="Tabela10.B2" office:value-type="string">
            <text:p text:style-name="P136">Verificação de Credenciais do Transportador <text:s/></text:p>
          </table:table-cell>
          <table:table-cell table:style-name="Tabela10.C2" office:value-type="string">
            <text:p text:style-name="P134"><text:span text:style-name="T59">RF-001 </text:span><text:span text:style-name="T60">e </text:span><text:span text:style-name="T59">RNF-002</text:span> </text:p>
          </table:table-cell>
        </table:table-row>
        <table:table-row table:style-name="Tabela10.3">
          <table:table-cell table:style-name="Tabela10.A3" table:number-columns-spanned="3" office:value-type="string">
            <text:p text:style-name="P142"><text:span text:style-name="T48">Detalhamento: </text:span><text:span text:style-name="T66">Apenas caminhoneiros e transportadoras com cadastro verificado e documentação validada pelo sistema podem visualizar e aceitar ofertas de frete. </text:span>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47" loext:marker-style-name="T3"><text:span text:style-name="T3">ID</text:span></text:p>
          </table:table-cell>
          <table:table-cell table:style-name="Tabela11.A1" office:value-type="string">
            <text:p text:style-name="P147" loext:marker-style-name="T3"><text:span text:style-name="T3">Descrição</text:span></text:p>
          </table:table-cell>
          <table:table-cell table:style-name="Tabela11.A1" office:value-type="string">
            <text:p text:style-name="P147" loext:marker-style-name="T3"><text:span text:style-name="T3">Requisitos Relacionados</text:span></text:p>
          </table:table-cell>
        </table:table-row>
        <table:table-row table:style-name="Tabela11.2">
          <table:table-cell table:style-name="Tabela11.A2" office:value-type="string">
            <text:p text:style-name="P122"><text:span text:style-name="T65">RNE-00</text:span><text:span text:style-name="T67">4</text:span></text:p>
          </table:table-cell>
          <table:table-cell table:style-name="Tabela11.B2" office:value-type="string">
            <text:p text:style-name="P136">Penalidades <text:span text:style-name="T97">Financeiras</text:span></text:p>
          </table:table-cell>
          <table:table-cell table:style-name="Tabela11.C2" office:value-type="string">
            <text:p text:style-name="P134"><text:s/><text:span text:style-name="T59">RF-004 e RF-005</text:span></text:p>
          </table:table-cell>
        </table:table-row>
        <table:table-row table:style-name="Tabela11.3">
          <table:table-cell table:style-name="Tabela11.A3" table:number-columns-spanned="3" office:value-type="string">
            <text:p text:style-name="P143"><text:span text:style-name="T49">Detalhamento:</text:span><text:span text:style-name="T47"> </text:span><text:span text:style-name="T69"><text:s/>Avarias comprovadas na entrega resultam em descontos automáticos no valor líquido a ser libertado.</text:span></text:p>
          </table:table-cell>
          <table:covered-table-cell/>
          <table:covered-table-cell/>
        </table:table-row>
      </table:table>
      <text:p text:style-name="P44"/>
      <text:list text:continue-numbering="true" text:style-name="WWNum1">
        <text:list-header>
          <text:h text:style-name="P11" text:outline-level="2"><text:bookmark-start text:name="_Toc221199223"/><text:bookmark-start text:name="__RefHeading___Toc9259_3774562879"/>14 REQUISITOS FUNCIONAIS<text:bookmark-end text:name="_Toc221199223"/><text:bookmark-end text:name="__RefHeading___Toc9259_3774562879"/></text:h>
        </text:list-header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46" loext:marker-style-name="T3"><text:span text:style-name="T3">ID</text:span></text:p>
          </table:table-cell>
          <table:table-cell table:style-name="Tabela6.A1" office:value-type="string">
            <text:p text:style-name="P146" loext:marker-style-name="T3"><text:span text:style-name="T3">Descrição</text:span></text:p>
          </table:table-cell>
          <table:table-cell table:style-name="Tabela6.A1" office:value-type="string">
            <text:p text:style-name="P146" loext:marker-style-name="T3"><text:span text:style-name="T3">Status</text:span></text:p>
          </table:table-cell>
          <table:table-cell table:style-name="Tabela6.A1" office:value-type="string">
            <text:p text:style-name="P146" loext:marker-style-name="T3"><text:span text:style-name="T3">Prioridade</text:span></text:p>
          </table:table-cell>
        </table:table-row>
        <table:table-row table:style-name="Tabela6.2">
          <table:table-cell table:style-name="Tabela6.A2" office:value-type="string">
            <text:p text:style-name="P124">RF-001 </text:p>
          </table:table-cell>
          <table:table-cell table:style-name="Tabela6.B2" office:value-type="string">
            <text:p text:style-name="P132">Cadastro de Transportadores </text:p>
          </table:table-cell>
          <table:table-cell table:style-name="Tabela6.C2" office:value-type="string">
            <text:p text:style-name="P132"/>
            <text:p text:style-name="P132">Planejado </text:p>
            <text:p text:style-name="P132"/>
          </table:table-cell>
          <table:table-cell table:style-name="Tabela6.D2" office:value-type="string">
            <text:p text:style-name="P132">Alta </text:p>
          </table:table-cell>
        </table:table-row>
        <table:table-row table:style-name="Tabela6.3">
          <table:table-cell table:style-name="Tabela6.A3" table:number-columns-spanned="4" office:value-type="string">
            <text:p text:style-name="P144"><text:span text:style-name="T51">Detalhamento: </text:span><text:span text:style-name="T52">O sistema deve permitir que motoristas autônomos e transportadoras realizem o cadastro de seus perfis, incluindo o envio de documentos para verificação de antecedentes e segurança.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ext:soft-page-break/>
        <table:table-row table:style-name="Tabela12.1">
          <table:table-cell table:style-name="Tabela12.A1" office:value-type="string">
            <text:p text:style-name="P148" loext:marker-style-name="T3"><text:span text:style-name="T3">ID</text:span></text:p>
          </table:table-cell>
          <table:table-cell table:style-name="Tabela12.A1" office:value-type="string">
            <text:p text:style-name="P148" loext:marker-style-name="T3"><text:span text:style-name="T3">Descrição</text:span></text:p>
          </table:table-cell>
          <table:table-cell table:style-name="Tabela12.A1" office:value-type="string">
            <text:p text:style-name="P148" loext:marker-style-name="T3"><text:span text:style-name="T3">Status</text:span></text:p>
          </table:table-cell>
          <table:table-cell table:style-name="Tabela12.A1" office:value-type="string">
            <text:p text:style-name="P148" loext:marker-style-name="T3"><text:span text:style-name="T3">Prioridade</text:span></text:p>
          </table:table-cell>
        </table:table-row>
        <table:table-row table:style-name="Tabela12.2">
          <table:table-cell table:style-name="Tabela12.A2" office:value-type="string">
            <text:p text:style-name="P123"><text:span text:style-name="T69">RF-00</text:span><text:span text:style-name="T70">2</text:span><text:span text:style-name="T69"> </text:span></text:p>
          </table:table-cell>
          <table:table-cell table:style-name="Tabela12.B2" office:value-type="string">
            <text:p text:style-name="P131">Anúncio e Gestão de Cargas </text:p>
          </table:table-cell>
          <table:table-cell table:style-name="Tabela12.C2" office:value-type="string">
            <text:p text:style-name="P131">Planejado </text:p>
          </table:table-cell>
          <table:table-cell table:style-name="Tabela12.D2" office:value-type="string">
            <text:p text:style-name="P131">Alta </text:p>
          </table:table-cell>
        </table:table-row>
        <table:table-row table:style-name="Tabela12.3">
          <table:table-cell table:style-name="Tabela12.A3" table:number-columns-spanned="4" office:value-type="string">
            <text:p text:style-name="P145"><text:span text:style-name="T49">Detalhamento:</text:span><text:span text:style-name="T50"> </text:span><text:span text:style-name="T66">O sistema deve possibilitar que o contratante anuncie a necessidade de frete, especificando o tipo de produto, volume, local de origem, destino e o prazo esperado para a entrega.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152">ID</text:p>
          </table:table-cell>
          <table:table-cell table:style-name="Tabela13.A1" office:value-type="string">
            <text:p text:style-name="P152">Descrição</text:p>
          </table:table-cell>
          <table:table-cell table:style-name="Tabela13.A1" office:value-type="string">
            <text:p text:style-name="P152">Status</text:p>
          </table:table-cell>
          <table:table-cell table:style-name="Tabela13.A1" office:value-type="string">
            <text:p text:style-name="P152">Prioridade</text:p>
          </table:table-cell>
        </table:table-row>
        <table:table-row table:style-name="Tabela13.2">
          <table:table-cell table:style-name="Tabela13.A2" office:value-type="string">
            <text:p text:style-name="P121"><text:span text:style-name="T65">RF-00</text:span><text:span text:style-name="T68">3</text:span><text:span text:style-name="T65"> </text:span></text:p>
          </table:table-cell>
          <table:table-cell table:style-name="Tabela13.B2" office:value-type="string">
            <text:p text:style-name="P133">Monitoramento de Entrega em Tempo Real </text:p>
          </table:table-cell>
          <table:table-cell table:style-name="Tabela13.C2" office:value-type="string">
            <text:p text:style-name="P133">Planejado </text:p>
          </table:table-cell>
          <table:table-cell table:style-name="Tabela13.D2" office:value-type="string">
            <text:p text:style-name="P133">Alta </text:p>
          </table:table-cell>
        </table:table-row>
        <table:table-row table:style-name="Tabela13.3">
          <table:table-cell table:style-name="Tabela13.A3" table:number-columns-spanned="4" office:value-type="string">
            <text:p text:style-name="P145"><text:span text:style-name="T48">Detalhamento: <text:s/></text:span><text:span text:style-name="T66">O sistema deve permitir que todas as partes envolvidas acompanhem o status da mercadoria durante o trajeto, registrando a saída, o trânsito e a confirmação final da entrega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152">ID</text:p>
          </table:table-cell>
          <table:table-cell table:style-name="Tabela14.A1" office:value-type="string">
            <text:p text:style-name="P152">Descrição</text:p>
          </table:table-cell>
          <table:table-cell table:style-name="Tabela14.A1" office:value-type="string">
            <text:p text:style-name="P152">Status</text:p>
          </table:table-cell>
          <table:table-cell table:style-name="Tabela14.A1" office:value-type="string">
            <text:p text:style-name="P152">Prioridade</text:p>
          </table:table-cell>
        </table:table-row>
        <table:table-row table:style-name="Tabela14.2">
          <table:table-cell table:style-name="Tabela14.A2" office:value-type="string">
            <text:p text:style-name="P126">RF-00<text:span text:style-name="T73">4</text:span> </text:p>
          </table:table-cell>
          <table:table-cell table:style-name="Tabela14.B2" office:value-type="string">
            <text:p text:style-name="P127">Processamento de Pagamento </text:p>
          </table:table-cell>
          <table:table-cell table:style-name="Tabela14.C2" office:value-type="string">
            <text:p text:style-name="P127">Planejado </text:p>
          </table:table-cell>
          <table:table-cell table:style-name="Tabela14.D2" office:value-type="string">
            <text:p text:style-name="P127">Alta </text:p>
          </table:table-cell>
        </table:table-row>
        <table:table-row table:style-name="Tabela14.3">
          <table:table-cell table:style-name="Tabela14.A3" table:number-columns-spanned="4" office:value-type="string">
            <text:p text:style-name="P139"><text:span text:style-name="T46">Detalhamento:</text:span><text:span text:style-name="T45"> </text:span><text:s/>O sistema deve processar o pagamento final ao transportador, aplicando as retenções de taxas e eventuais penalidades descritas na RNE-004, garantindo que a libertação só ocorra sob as condições da RNE-001.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152">ID</text:p>
          </table:table-cell>
          <table:table-cell table:style-name="Tabela15.A1" office:value-type="string">
            <text:p text:style-name="P152">Descrição</text:p>
          </table:table-cell>
          <table:table-cell table:style-name="Tabela15.A1" office:value-type="string">
            <text:p text:style-name="P152">Status</text:p>
          </table:table-cell>
          <table:table-cell table:style-name="Tabela15.A1" office:value-type="string">
            <text:p text:style-name="P152">Prioridade</text:p>
          </table:table-cell>
        </table:table-row>
        <table:table-row table:style-name="Tabela15.2">
          <table:table-cell table:style-name="Tabela15.A2" office:value-type="string">
            <text:p text:style-name="P126">RF-00<text:span text:style-name="T73">5</text:span> </text:p>
          </table:table-cell>
          <table:table-cell table:style-name="Tabela15.B2" office:value-type="string">
            <text:p text:style-name="P127">Registro de Ocorrências e Sinistros </text:p>
          </table:table-cell>
          <table:table-cell table:style-name="Tabela15.C2" office:value-type="string">
            <text:p text:style-name="P127">Planejado </text:p>
          </table:table-cell>
          <table:table-cell table:style-name="Tabela15.D2" office:value-type="string">
            <text:p text:style-name="P127">Média </text:p>
          </table:table-cell>
        </table:table-row>
        <table:table-row table:style-name="Tabela15.3">
          <table:table-cell table:style-name="Tabela15.A3" table:number-columns-spanned="4" office:value-type="string">
            <text:p text:style-name="P139"><text:span text:style-name="T46">Detalhamento: </text:span><text:span text:style-name="T45">O sistema deve permitir o registo de avarias ou roubos, servindo como base de dados para a validação da cobertura de seguro (RNE-002) e cálculo de multas contratuais.</text:span></text:p>
          </table:table-cell>
          <table:covered-table-cell/>
          <table:covered-table-cell/>
          <table:covered-table-cell/>
        </table:table-row>
      </table:table>
      <text:h text:style-name="P19" text:outline-level="3"/>
      <text:p text:style-name="P43"/>
      <text:list text:continue-numbering="true" text:style-name="WWNum1">
        <text:list-header>
          <text:h text:style-name="P14" text:outline-level="2"><text:bookmark-start text:name="_Toc221199224"/><text:bookmark-start text:name="__RefHeading___Toc9261_3774562879"/>15 REQUISITOS NÃO FUNCIONAIS<text:bookmark-end text:name="_Toc221199224"/><text:bookmark-end text:name="__RefHeading___Toc9261_3774562879"/></text:h>
        </text:list-header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office:value-type="string">
            <text:p text:style-name="P149" loext:marker-style-name="T3"><text:span text:style-name="T3">ID</text:span></text:p>
          </table:table-cell>
          <table:table-cell table:style-name="Tabela16.A1" office:value-type="string">
            <text:p text:style-name="P149" loext:marker-style-name="T3"><text:span text:style-name="T3">Descrição</text:span></text:p>
          </table:table-cell>
          <table:table-cell table:style-name="Tabela16.A1" office:value-type="string">
            <text:p text:style-name="P149" loext:marker-style-name="T3"><text:span text:style-name="T3">Status</text:span></text:p>
          </table:table-cell>
          <table:table-cell table:style-name="Tabela16.A1" office:value-type="string">
            <text:p text:style-name="P149" loext:marker-style-name="T3"><text:span text:style-name="T3">Prioridade</text:span></text:p>
          </table:table-cell>
        </table:table-row>
        <table:table-row table:style-name="Tabela16.2">
          <table:table-cell table:style-name="Tabela16.A2" office:value-type="string">
            <text:p text:style-name="P128">RNF-<text:span text:style-name="T73">001</text:span></text:p>
          </table:table-cell>
          <table:table-cell table:style-name="Tabela16.B2" office:value-type="string">
            <text:p text:style-name="P129">Confiabilidade nos Dados de Rastreamento </text:p>
          </table:table-cell>
          <table:table-cell table:style-name="Tabela16.C2" office:value-type="string">
            <text:p text:style-name="P129">Planejado </text:p>
          </table:table-cell>
          <table:table-cell table:style-name="Tabela16.D2" office:value-type="string">
            <text:p text:style-name="P129">Alta </text:p>
          </table:table-cell>
        </table:table-row>
        <table:table-row table:style-name="Tabela16.3">
          <table:table-cell table:style-name="Tabela16.A3" table:number-columns-spanned="4" office:value-type="string">
            <text:p text:style-name="P140"><text:span text:style-name="T46">Detalhamento: </text:span>O sistema deve garantir que as atualizações de localização e status da carga sejam precisas e auditáveis, pois servem de base para o gatilho financeiro de liberação do pagamento. 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149" loext:marker-style-name="T3"><text:span text:style-name="T3">ID</text:span></text:p>
          </table:table-cell>
          <table:table-cell table:style-name="Tabela7.A1" office:value-type="string">
            <text:p text:style-name="P149" loext:marker-style-name="T3"><text:span text:style-name="T3">Descrição</text:span></text:p>
          </table:table-cell>
          <table:table-cell table:style-name="Tabela7.A1" office:value-type="string">
            <text:p text:style-name="P149" loext:marker-style-name="T3"><text:span text:style-name="T3">Status</text:span></text:p>
          </table:table-cell>
          <table:table-cell table:style-name="Tabela7.A1" office:value-type="string">
            <text:p text:style-name="P149" loext:marker-style-name="T3"><text:span text:style-name="T3">Prioridade</text:span></text:p>
          </table:table-cell>
        </table:table-row>
        <table:table-row table:style-name="Tabela7.2">
          <table:table-cell table:style-name="Tabela7.A2" office:value-type="string">
            <text:p text:style-name="P128">RNF-<text:span text:style-name="T73">00</text:span><text:span text:style-name="T74">2</text:span></text:p>
          </table:table-cell>
          <table:table-cell table:style-name="Tabela7.B2" office:value-type="string">
            <text:p text:style-name="P129">Segurança e Proteção de Dados Sensíveis </text:p>
          </table:table-cell>
          <table:table-cell table:style-name="Tabela7.C2" office:value-type="string">
            <text:p text:style-name="P129">Planejado </text:p>
          </table:table-cell>
          <table:table-cell table:style-name="Tabela7.D2" office:value-type="string">
            <text:p text:style-name="P129">Alta </text:p>
          </table:table-cell>
        </table:table-row>
        <table:table-row table:style-name="Tabela7.3">
          <table:table-cell table:style-name="Tabela7.A3" table:number-columns-spanned="4" office:value-type="string">
            <text:p text:style-name="P140"><text:span text:style-name="T46">Detalhamento:</text:span><text:span text:style-name="T45"> </text:span>O software deve garantir o sigilo dos documentos enviados para cadastro e a segurança das transações financeiras em escrow, impedindo o acesso de terceiros não autorizados. </text:p>
          </table:table-cell>
          <table:covered-table-cell/>
          <table:covered-table-cell/>
          <table:covered-table-cell/>
        </table:table-row>
      </table:table>
      <text:p text:style-name="P4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ext:soft-page-break/>
        <table:table-row table:style-name="Tabela17.1">
          <table:table-cell table:style-name="Tabela17.A1" office:value-type="string">
            <text:p text:style-name="P149" loext:marker-style-name="T3"><text:span text:style-name="T3">ID</text:span></text:p>
          </table:table-cell>
          <table:table-cell table:style-name="Tabela17.A1" office:value-type="string">
            <text:p text:style-name="P149" loext:marker-style-name="T3"><text:span text:style-name="T3">Descrição</text:span></text:p>
          </table:table-cell>
          <table:table-cell table:style-name="Tabela17.A1" office:value-type="string">
            <text:p text:style-name="P149" loext:marker-style-name="T3"><text:span text:style-name="T3">Status</text:span></text:p>
          </table:table-cell>
          <table:table-cell table:style-name="Tabela17.A1" office:value-type="string">
            <text:p text:style-name="P149" loext:marker-style-name="T3"><text:span text:style-name="T3">Prioridade</text:span></text:p>
          </table:table-cell>
        </table:table-row>
        <table:table-row table:style-name="Tabela17.2">
          <table:table-cell table:style-name="Tabela17.A2" office:value-type="string">
            <text:p text:style-name="P128">RNF-<text:span text:style-name="T73">00</text:span><text:span text:style-name="T74">3</text:span></text:p>
          </table:table-cell>
          <table:table-cell table:style-name="Tabela17.B2" office:value-type="string">
            <text:p text:style-name="P129">Usabilidade em Contexto de Mobilidade </text:p>
          </table:table-cell>
          <table:table-cell table:style-name="Tabela17.C2" office:value-type="string">
            <text:p text:style-name="P129">Planejado </text:p>
          </table:table-cell>
          <table:table-cell table:style-name="Tabela17.D2" office:value-type="string">
            <text:p text:style-name="P129">Alta </text:p>
          </table:table-cell>
        </table:table-row>
        <table:table-row table:style-name="Tabela17.3">
          <table:table-cell table:style-name="Tabela17.A3" table:number-columns-spanned="4" office:value-type="string">
            <text:p text:style-name="P140"><text:span text:style-name="T46">Detalhamento: </text:span>A interface para o transportador deve ser otimizada para uso em dispositivos móveis, com botões de fácil acionamento e leitura clara, considerando que o usuário estará em ambiente de trânsito. 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 table:style-name="Tabela18.1">
          <table:table-cell table:style-name="Tabela18.A1" office:value-type="string">
            <text:p text:style-name="P149" loext:marker-style-name="T3"><text:span text:style-name="T3">ID</text:span></text:p>
          </table:table-cell>
          <table:table-cell table:style-name="Tabela18.A1" office:value-type="string">
            <text:p text:style-name="P149" loext:marker-style-name="T3"><text:span text:style-name="T3">Descrição</text:span></text:p>
          </table:table-cell>
          <table:table-cell table:style-name="Tabela18.A1" office:value-type="string">
            <text:p text:style-name="P149" loext:marker-style-name="T3"><text:span text:style-name="T3">Status</text:span></text:p>
          </table:table-cell>
          <table:table-cell table:style-name="Tabela18.A1" office:value-type="string">
            <text:p text:style-name="P149" loext:marker-style-name="T3"><text:span text:style-name="T3">Prioridade</text:span></text:p>
          </table:table-cell>
        </table:table-row>
        <table:table-row table:style-name="Tabela18.2">
          <table:table-cell table:style-name="Tabela18.A2" office:value-type="string">
            <text:p text:style-name="P128">RNF-<text:span text:style-name="T73">00</text:span><text:span text:style-name="T74">4</text:span></text:p>
          </table:table-cell>
          <table:table-cell table:style-name="Tabela18.B2" office:value-type="string">
            <text:p text:style-name="P129">Disponibilidade do Serviço de Monitoramento </text:p>
          </table:table-cell>
          <table:table-cell table:style-name="Tabela18.C2" office:value-type="string">
            <text:p text:style-name="P129">Planejado </text:p>
          </table:table-cell>
          <table:table-cell table:style-name="Tabela18.D2" office:value-type="string">
            <text:p text:style-name="P129">Média </text:p>
          </table:table-cell>
        </table:table-row>
        <table:table-row table:style-name="Tabela18.3">
          <table:table-cell table:style-name="Tabela18.A3" table:number-columns-spanned="4" office:value-type="string">
            <text:p text:style-name="P140"><text:span text:style-name="T46">Detalhamento: </text:span>O serviço deve manter uma alta taxa de disponibilidade (24/7) para que o registro de entregas e ocorrências possa ser feito em qualquer horário, sem interrupções que atrasem a liberação financeira. </text:p>
          </table:table-cell>
          <table:covered-table-cell/>
          <table:covered-table-cell/>
          <table:covered-table-cell/>
        </table:table-row>
      </table:table>
      <text:p text:style-name="P82" loext:marker-style-name="T22"/>
      <text:h text:style-name="P37" text:outline-level="1"><text:bookmark-start text:name="_Toc221199225"/><text:bookmark-start text:name="__RefHeading___Toc9263_3774562879"/>PARTE 04 – DESIGN, MODELAGEM, DADOS E SOLUÇÃO TECNOLÓGICA<text:bookmark-end text:name="_Toc221199225"/><text:bookmark-end text:name="__RefHeading___Toc9263_3774562879"/></text:h>
      <text:h text:style-name="P25" text:outline-level="2"><text:bookmark-start text:name="_Toc221199226"/><text:bookmark-start text:name="__RefHeading___Toc9265_3774562879"/>16 DESIGN DA SOLUÇÃO E EXPERIÊNCIA DO USUÁRIO<text:bookmark-end text:name="_Toc221199226"/><text:bookmark-end text:name="__RefHeading___Toc9265_3774562879"/></text:h>
      <text:list text:continue-numbering="true" text:style-name="WWNum1">
        <text:list-header>
          <text:p text:style-name="P161">O fluxo de navegação foi estruturado para representar de forma clara a jornada operacional e financeira da plataforma logística, contemplando as interações entre embarcador, transportador e sistema.</text:p>
          <text:p text:style-name="P162">A modelagem foi organizada em três fluxos principais: Embarcador, Transportador e Financeiro permitindo visualizar não apenas as ações realizadas pelos usuários, mas também as validações automáticas, regras de negócio e garantias de segurança aplicadas ao longo do processo.</text:p>
          <text:p text:style-name="P159">Essa estrutura garante coerência entre requisitos funcionais, regras de negócio e comportamento prático do sistema.</text:p>
        </text:list-header>
      </text:list>
      <text:h text:style-name="P30" text:outline-level="3"><text:bookmark-start text:name="_Toc221199227"/><text:bookmark-start text:name="__RefHeading___Toc9267_3774562879"/>16.1 Fluxo de Navegação<text:bookmark-end text:name="_Toc221199227"/><text:bookmark-end text:name="__RefHeading___Toc9267_3774562879"/></text:h>
      <text:list text:continue-numbering="true" text:style-name="WWNum1">
        <text:list-header>
          <text:p text:style-name="P165"><text:span text:style-name="T37">1. Fluxo do Embarcador<text:line-break/>O fluxo do embarcador representa a jornada completa do usuário responsável pela contratação do frete, desde o acesso inicial à plataforma até o início efetivo da operação. O processo começa com o acesso à plataforma, por meio de login </text:span><text:soft-page-break/><text:span text:style-name="T37">ou cadastro, atendendo à necessidade de gestão de identidade e controle de acesso.</text:span> <text:span text:style-name="T37">Após a autenticação, o usuário é direcionado ao dashboard principal, onde pode visualizar operações anteriores e iniciar novas solicitações.</text:span></text:p>
          <text:p text:style-name="P165">Ao selecionar a opção de criar-nova operação de frete, o embarcador inicia formalmente o processo logístico. Nessa etapa, realiza a inserção dos dados da carga como tipo de mercadoria, peso, dimensões, origem, destino e prazos informações essenciais para que o sistema execute corretamente o algoritmo de matching inteligente. Após o preenchimento, o sistema realiza a validação dos dados contratuais, assegurando consistência e integridade das informações armazenadas. Esse cuidado atende às exigências de segurança jurídica e auditabilidade dos dados.<text:line-break/>Em seguida, é executado o matching automático, que conecta a carga ao transportador mais adequado com base em critérios como localização, tipo de veículo e rota, podendo contemplar tanto fretes de grande porte quanto operações de última milha. Durante o matching, ocorre uma verificação obrigatória: o transportador possui seguro ativo e válido? Caso não possua, o sistema bloqueia automaticamente sua elegibilidade, impedindo a alocação da carga. Essa regra reforça o princípio de que nenhuma operação pode ser iniciada sem seguro validado na plataforma.</text:p>
          <text:p text:style-name="P165">Caso o seguro esteja ativo, o sistema sugere o transportador ideal ao embarcador.<text:line-break/>Ao confirmar a alocação, é criada uma operação ativa no sistema e o mecanismo de escrow logístico é acionado, retendo o valor acordado como garantia da transação. A partir desse momento, a operação é oficialmente iniciada. Esse fluxo garante que a contratação só ocorra após validação documental, conformidade legal e segurança financeira.</text:p>
        </text:list-header>
      </text:list>
      <text:p text:style-name="P178"/>
      <text:p text:style-name="P178"/>
      <text:p text:style-name="P178"/>
      <text:p text:style-name="P178"><text:soft-page-break/></text:p>
      <text:p text:style-name="P178"/>
      <text:list text:continue-numbering="true" text:style-name="WWNum1">
        <text:list-header>
          <text:h text:style-name="P22" text:outline-level="4">Figura 1 – Fluxo do Embarcador</text:h>
          <text:p text:style-name="P187"><draw:frame draw:style-name="fr1" draw:name="Figura1" text:anchor-type="char" svg:width="14.76cm" svg:height="20.75cm" draw:z-index="218"><draw:image xlink:href="Pictures/100134A700006A3F00009D19D877D54A.pdf" xlink:type="simple" xlink:show="embed" xlink:actuate="onLoad" draw:mime-type="application/pdf"/><draw:image xlink:href="Pictures/1000000100000404000005F060CC5570.png" xlink:type="simple" xlink:show="embed" xlink:actuate="onLoad" draw:mime-type="image/png"/></draw:frame><text:soft-page-break/>Fonte: Pedro Henrique Silva (2026)</text:p>
          <text:p text:style-name="P163"><text:bookmark-start text:name="__RefHeading___Toc9269_3774562879"/><text:soft-page-break/>2. Fluxo do Transportador<text:line-break/>O fluxo do transportador descreve a execução prática da operação logística, com foco em controle, rastreabilidade e conformidade. O processo inicia com o login no aplicativo do motorista. O sistema realiza automaticamente a validação do cadastro e da vigência do seguro obrigatório, assegurando que apenas transportadores regularizados possam participar da operação.<text:bookmark-end text:name="__RefHeading___Toc9269_3774562879"/></text:p>
          <text:p text:style-name="P164">Após a validação, o transportador visualiza os fretes disponíveis, resultado do algoritmo de matching inteligente. Ao aceitar uma operação e ter sua alocação confirmada pelo embarcador, a operação passa a constar como ativa em seu painel. Com a ativação, o status inicial é definido como “Aguardando Coleta”. Ao confirmar a retirada da carga, o sistema atualiza automaticamente o status para “Em Trânsito”.</text:p>
          <text:p text:style-name="P164">Durante o deslocamento, o sistema permite o acompanhamento em tempo real do status da entrega e possibilita o registro de ocorrências, como atrasos ou avarias. Essa funcionalidade garante transparência e rastreabilidade, além de alimentar o módulo financeiro caso haja necessidade de aplicação de penalidades contratuais.<text:line-break/>Considerando que caminhoneiros podem operar em regiões com baixa conectividade, o aplicativo foi concebido com suporte a funcionalidades críticas em modo offline, permitindo que confirmações de coleta e entrega sejam registradas mesmo sem conexão imediata, sincronizando posteriormente.</text:p>
          <text:p text:style-name="P164">Ao chegar ao destino, o motorista realiza a confirmação digital da entrega. Esse registro funciona como prova formal de cumprimento contratual e serve como gatilho para o início da etapa financeira.</text:p>
        </text:list-header>
      </text:list>
      <text:h text:style-name="P31" text:outline-level="3"/>
      <text:h text:style-name="P31" text:outline-level="3"/>
      <text:h text:style-name="P31" text:outline-level="3"/>
      <text:h text:style-name="P31" text:outline-level="3"/>
      <text:list text:continue-numbering="true" text:style-name="WWNum1">
        <text:list-header>
          <text:h text:style-name="P24" text:outline-level="4"><text:soft-page-break/><text:span text:style-name="T56">Figura 2 <text:s/>- </text:span><text:span text:style-name="T55">Fluxo do Transportador</text:span></text:h>
        </text:list-header>
      </text:list>
      <text:h text:style-name="P31" text:outline-level="3"><draw:frame draw:style-name="fr1" draw:name="Figura2" text:anchor-type="char" svg:width="12.15cm" svg:height="20.1cm" draw:z-index="219"><draw:image xlink:href="Pictures/100149EE000058930000BC84AF44FE10.pdf" xlink:type="simple" xlink:show="embed" xlink:actuate="onLoad" draw:mime-type="application/pdf"/><draw:image xlink:href="Pictures/10000001000003590000072033B6F70C.png" xlink:type="simple" xlink:show="embed" xlink:actuate="onLoad" draw:mime-type="image/png"/></draw:frame></text:h>
      <text:h text:style-name="P31" text:outline-level="3"/>
      <text:h text:style-name="P31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3" text:outline-level="3"/>
      <text:h text:style-name="P33" text:outline-level="3"/>
      <text:h text:style-name="P35" text:outline-level="3"/>
      <text:list text:continue-numbering="true" text:style-name="WWNum1">
        <text:list-header>
          <text:p text:style-name="P187"><text:bookmark-start text:name="__RefHeading___Toc20794_3774562879"/>Fonte: Aluno Pedro Henrique Silva <text:span text:style-name="T75">(2026)</text:span><text:bookmark-end text:name="__RefHeading___Toc20794_3774562879"/></text:p>
          <text:p text:style-name="P164"><text:soft-page-break/><text:span text:style-name="T59">3. Fluxo Financeiro</text:span><text:line-break/><text:span text:style-name="T59">O fluxo financeiro foi modelado com foco em segurança, confiabilidade e mitigação de riscos operacionais. O processo inicia no momento em que o embarcador confirma a contratação do frete. O sistema retém o valor acordado em escrow logístico, mantendo-o bloqueado até que a entrega seja devidamente confirmada. Durante a execução da operação, o pagamento permanece retido, respeitando a regra central do sistema: o transportador só recebe se entregar conforme o contrato. Após a confirmação da entrega, o sistema realiza a verificação final. </text:span></text:p>
          <text:p text:style-name="P164">Caso a entrega não esteja devidamente confirmada, o pagamento continua retido até que a situação seja regularizada. Caso esteja confirmada, o sistema emite a ordem de liberação financeira, enviando o sinal seguro ao módulo responsável pela execução da movimentação financeira. Nesse momento, o status é atualizado para “Pago”, a transação é registrada para fins contábeis e as partes envolvidas são notificadas. Se houver atraso ou ocorrência registrada, o sistema aplica automaticamente as penalidades previstas no contrato, descontando os valores diretamente do montante retido no escrow.</text:p>
          <text:h text:style-name="P23" text:outline-level="4"><text:soft-page-break/><text:span text:style-name="T61">Figura 3 - </text:span><text:span text:style-name="T59">Fluxo Financeiro</text:span></text:h>
          <text:p text:style-name="P187"><draw:frame draw:style-name="fr1" draw:name="Figura3" text:anchor-type="char" svg:width="14.982cm" svg:height="20.817cm" draw:z-index="220"><draw:image xlink:href="Pictures/100107940000491200007EB61F7ABE8E.pdf" xlink:type="simple" xlink:show="embed" xlink:actuate="onLoad" draw:mime-type="application/pdf"/><draw:image xlink:href="Pictures/10000001000002C3000004CA2B6F16A7.png" xlink:type="simple" xlink:show="embed" xlink:actuate="onLoad" draw:mime-type="image/png"/></draw:frame>Fonte: Pedro Henrique Silva (2026)</text:p>
        </text:list-header>
      </text:list>
      <text:h text:style-name="P34" text:outline-level="3"><text:bookmark-start text:name="__RefHeading___Toc9275_3774562879COPY_IS_MOVE"/><text:bookmark-start text:name="_Toc221199228COPY_IS_MOVE"/><text:soft-page-break/>16.2 Protótipos do Sistema<text:bookmark-end text:name="_Toc221199228COPY_IS_MOVE"/> <text:bookmark-end text:name="__RefHeading___Toc9275_3774562879COPY_IS_MOVE"/></text:h>
      <text:list text:continue-numbering="true" text:style-name="WWNum1">
        <text:list-header>
          <text:p text:style-name="P163">Para representar a estrutura inicial do sistema, foram desenvolvidos wireframes de baixa fidelidade. Esses protótipos têm como objetivo demonstrar a organização das telas, o fluxo de navegação e a disposição dos principais elementos da interface, sem foco em design final ou identidade visual. Os wireframes foram criados com base nos requisitos funcionais definidos anteriormente e representam as principais etapas de utilização da plataforma.</text:p>
          <text:p text:style-name="P164">Tela de Login / Cadastro: <text:span text:style-name="T76">a</text:span> primeira interface apresentada é a tela de login e cadastro do sistema. No wireframe é possível observar um layout simples, com um espaço central destinado ao formulário de acesso. Nessa área estão posicionados os campos necessários para autenticação do usuário, como e-mail e senha, além da opção de cadastro para novos usuários. O objetivo dessa tela é permitir que embarcadores e transportadores acessem a plataforma de forma segura antes de utilizar as funcionalidades do sistema. Essa etapa representa o primeiro ponto de interação do usuário com a plataforma.</text:p>
          <text:p text:style-name="P164">Dashboard Principal: <text:span text:style-name="T76">a</text:span>pós realizar o login, o usuário é direcionado ao dashboard principal. Essa tela funciona como o centro de controle do sistema, onde são apresentadas as principais informações e operações disponíveis. No wireframe é possível observar uma barra lateral de navegação e, na área principal, cartões informativos que representam indicadores do sistema, como operações ativas e status das cargas. A tela também apresenta uma lista de operações em andamento, permitindo que o usuário visualize rapidamente suas atividades. Além disso, existe um botão de destaque que permite iniciar uma nova operação de frete.</text:p>
          <text:p text:style-name="P174"><text:span text:style-name="T37">Criação de Nova Operação (Passo 1 de 3): </text:span><text:span text:style-name="T53">a</text:span><text:span text:style-name="T37"> criação de uma nova operação foi organizada em um processo dividido em etapas. No primeiro passo, o usuário informa os dados básicos da rota da carga. O wireframe apresenta campos destinados à definição da origem e destino do transporte, além de outras informações iniciais necessárias para iniciar a operação. Também é possível observar um indicador visual de progresso no topo da tela, mostrando que o</text:span> <text:soft-page-break/><text:span text:style-name="T37">processo possui múltiplas etapas. Essa divisão em etapas facilita o preenchimento das informações e melhora a organização dos dados inseridos pelo usuário.</text:span></text:p>
          <text:p text:style-name="P164">Dados da Carga (Passo 2 de 3): <text:span text:style-name="T76">n</text:span>a segunda etapa do processo são inseridas as informações detalhadas da carga. O layout apresenta campos para preenchimento de características importantes, como dimensões, peso e valor da mercadoria. Também existe uma opção relacionada à contratação de seguro da carga, que pode ser selecionada pelo usuário caso necessário. Os campos foram organizados em blocos para facilitar a leitura e o preenchimento das informações.<text:line-break/>Essa etapa é essencial para que o sistema possa realizar corretamente a busca por transportadores compatíveis com o tipo de carga.</text:p>
          <text:p text:style-name="P164">Validação Contratual (Passo 3 de 3): <text:span text:style-name="T76">a</text:span>pós o preenchimento dos dados da carga, o sistema realiza a etapa de validação contratual. Nesse momento, o wireframe apresenta uma área onde são exibidas verificações relacionadas à operação. Essas verificações podem incluir confirmação de dados, validação de requisitos contratuais e análise de condições necessárias para que a operação seja realizada. Cada item é apresentado com um indicador visual de status, permitindo ao usuário acompanhar quais verificações foram aprovadas. Essa etapa garante maior segurança antes da confirmação da operação.</text:p>
          <text:p text:style-name="P164">Confirmação de Alocação: <text:span text:style-name="T76">d</text:span>epois das validações, o sistema apresenta uma tela de confirmação da alocação do transportador. Nesse momento, o usuário pode revisar todas as informações da operação antes da confirmação final. No wireframe é possível observar uma área principal contendo os dados da operação e, ao lado, um painel com informações do transportador selecionado. Essa organização permite que o embarcador analise os dados de forma clara antes de confirmar a operação. Após a confirmação, a operação é registrada no sistema.</text:p>
          <text:p text:style-name="P166"><text:bookmark-start text:name="__RefHeading___Toc9281_3774562879"/><text:span text:style-name="T37">Acompanhamento da Operação: </text:span><text:span text:style-name="T54">p</text:span><text:span text:style-name="T37">or fim, foi prototipada a tela de acompanhamento da operação. Essa interface permite que o usuário visualize o andamento do frete após sua ativação. O wireframe apresenta uma linha do tempo vertical com os principais eventos da operação, permitindo acompanhar as etapas do transporte. </text:span><text:soft-page-break/><text:span text:style-name="T37">Além disso, existem painéis laterais com informações adicionais sobre a carga e o</text:span> <text:span text:style-name="T37">transportador responsável. Es</text:span><text:span text:style-name="T54">t</text:span><text:span text:style-name="T37">a tela foi projetada para facilitar o monitoramento das operações e fornecer uma visão clara do progresso do transporte.</text:span><text:bookmark-end text:name="__RefHeading___Toc9281_3774562879"/></text:p>
        </text:list-header>
      </text:list>
      <text:p text:style-name="P178"><text:span text:style-name="T37"/></text:p>
      <text:list text:continue-numbering="true" text:style-name="WWNum1">
        <text:list-header>
          <text:h text:style-name="P13" text:outline-level="2"><text:bookmark-start text:name="__RefHeading___Toc2211_1037354077"/>17 GESTÃO DO PROJETO DE MODELAGEM DO SISTEMA<text:bookmark-end text:name="__RefHeading___Toc2211_1037354077"/></text:h>
          <text:h text:style-name="P20" text:outline-level="3"><text:bookmark-start text:name="__RefHeading___Toc2213_1037354077"/>17.1 Organização do Projeto (Abordagem Ágil)<text:bookmark-end text:name="__RefHeading___Toc2213_1037354077"/></text:h>
        </text:list-header>
      </text:list>
      <text:p text:style-name="P179"/>
      <text:list text:continue-numbering="true" text:style-name="WWNum1">
        <text:list-header>
          <text:p text:style-name="P175">Para a condução do Projeto Pilot, <text:span text:style-name="T77">nós</text:span> adot<text:span text:style-name="T77">amos</text:span> uma abordagem ágil simplificada, focada na organização visual e na eficiência da execução das tarefas. Utilizamos o método Kanban para o acompanhamento do progresso, permitindo que todos os integrantes visualizem claramente o fluxo de trabalho dividido em colunas de "A fazer", "Em execução" e "Concluído". A distribuição das atividades é feita com base na competência e familiaridade técnica de cada integrante, garantindo maior qualidade nos artefatos entregues. </text:p>
          <text:p text:style-name="P176">Para este ciclo (Fase 02), a divisão foi estabelecida da seguinte forma: </text:p>
          <text:p text:style-name="P176">Lucas Pereira Macedo: Responsável pela aplicação e coordenação da pesquisa com usuários (quantitativa e qualitativa), além da atualização contínua, preenchimento e formatação acadêmica deste documento de especificação. </text:p>
          <text:p text:style-name="P176">Pedro Henrique Silva: <text:span text:style-name="T77">Líder de equipe, e</text:span>ncarregado da atualização e refinamento dos protótipos de baixa e média fidelidade no Figma, incorporando os feedbacks coletados durante as pesquisas.</text:p>
          <text:p text:style-name="P176">Kauã Ferreira Grande: Focado na modelagem conceitual dos dados e na estruturação dos diagramas iniciais do sistema que apoiam a lógica do Escrow Logístico.</text:p>
          <text:p text:style-name="P176">Ess<text:span text:style-name="T77">e modo de </text:span>organização permite que o projeto evolua de forma equilibrada, unindo a visão de design, a estrutura de dados e a documentação necessária para o cumprimento dos objetivos do semestre</text:p>
          <text:h text:style-name="P21" text:outline-level="3"><text:bookmark-start text:name="__RefHeading___Toc2216_1037354077"/><text:soft-page-break/>17.2 Modelagem e Diagramas do Sistema<text:bookmark-end text:name="__RefHeading___Toc2216_1037354077"/></text:h>
          <text:p text:style-name="P73"/>
          <text:p text:style-name="P187">Figura – 4 Diagrama de <text:span text:style-name="T85">Caso de Uso</text:span></text:p>
          <text:p text:style-name="P73"><draw:frame draw:style-name="fr2" draw:name="Figura4" text:anchor-type="as-char" svg:width="16.067cm" svg:height="19.198cm" draw:z-index="186"><draw:image xlink:href="Pictures/100000010000027C000002F8FB74275C.png" xlink:type="simple" xlink:show="embed" xlink:actuate="onLoad" draw:mime-type="image/png"/></draw:frame></text:p>
          <text:p text:style-name="P187">Fonte: Kauã Ferreira Grande (2026)</text:p>
          <text:p text:style-name="P191"><text:soft-page-break/>Diagrama de <text:span text:style-name="T85">Caso de Uso</text:span></text:p>
          <text:p text:style-name="P191">O diagrama representa quem usa o sistema e o que cada um pode fazer, seguindo a notação UML padrão. <text:span text:style-name="T89">O </text:span>sistema tem três atores: <text:span text:style-name="T89">e</text:span>mbarcador é o produtor rural, frigorífico ou agroindústria que contrata o frete, <text:span text:style-name="T89">o t</text:span>ransportador <text:span text:style-name="T89">que </text:span>é o caminhoneiro autônomo ou transportadora que executa a entrega <text:span text:style-name="T89">e</text:span> Sistema representa processos automáticos que ocorrem sem interação humana direta, como o matching.</text:p>
          <text:p text:style-name="P191">Casos de uso compartilhados "Fazer login / cadastro" é o único caso de uso acessível pelos dois atores humanos, pois ambos precisam se autenticar antes de qualquer ação. </text:p>
          <text:p text:style-name="P191">Casos de uso do Embarcador (azul/verde) <text:span text:style-name="T89">s</text:span>ão os casos que representam a jornada de quem contrata o frete: anunciar a carga com origem, destino e prazo; confirmar a alocação do transportador sugerido pelo sistema; monitorar a entrega em tempo real; e confirmar o recebimento da mercadoria, que é o gatilho para liberar o pagamento do escrow.</text:p>
          <text:p text:style-name="P191">Casos de uso do Transportador (roxo) <text:span text:style-name="T89">s</text:span>ão os casos que representam a jornada de quem executa o frete: visualizar os fretes disponíveis que o algoritmo de matching selecionou para ele; confirmar a coleta da carga no ponto de origem; monitorar a operação (também acessa, pois precisa ver o status da rota); e registrar ocorrências como avarias ou atrasos.</text:p>
          <text:p text:style-name="P191">Relações especiais: <text:span text:style-name="T89">a</text:span> linha tracejada com «include» entre "Anunciar carga" e "Executar matching automático" significa que toda vez que um embarcador anuncia uma carga, o sistema obrigatoriamente executa o algoritmo de matching não é opcional. Já a linha tracejada com «extend» entre "Registrar ocorrência" e "Confirmar recebimento" significa que, quando uma ocorrência é registrada, ela pode estender o fluxo de confirmação, acionando a aplicação automática de penalidades contratuais sobre o valor retido no escrow (regra RNE-004 do documento).</text:p>
        </text:list-header>
      </text:list>
      <text:p text:style-name="P192"/>
      <text:list text:continue-numbering="true" text:style-name="WWNum1">
        <text:list-header>
          <text:p text:style-name="P188"><text:soft-page-break/>Figura – <text:span text:style-name="T84">5</text:span> Diagrama de <text:span text:style-name="T86">Classes</text:span></text:p>
          <text:p text:style-name="P189"><draw:frame draw:style-name="fr1" draw:name="Figura5" text:anchor-type="char" svg:width="15.372cm" svg:height="19.687cm" draw:z-index="221"><draw:image xlink:href="Pictures/10000001000002450000029C61C6DD6B.png" xlink:type="simple" xlink:show="embed" xlink:actuate="onLoad" draw:mime-type="image/png"/></draw:frame>Fonte: Kauã Ferreira Grande (2026)</text:p>
        </text:list-header>
      </text:list>
      <text:p text:style-name="P190"/>
      <text:p text:style-name="P193"><text:soft-page-break/>Diagrama de Classes </text:p>
      <text:p text:style-name="P194">O diagrama representa a estrutura interna do software quais entidades existem, quais dados cada uma guarda, e como elas se relacionam entre si. </text:p>
      <text:p text:style-name="P194">Hierarquia de usuários: <text:span text:style-name="T90">U</text:span>suário é uma classe abstrata no topo ela nunca é instanciada diretamente, mas define os atributos comuns (id, nome, email) e os métodos básicos (autenticar, atualizar perfil). Embarcador e Transportador herdam dela, adicionando atributos específicos: o Embarcador tem CNPJ e tipo de produto; o Transportador tem CNH, tipo de veículo e um indicador de credencial validada.</text:p>
      <text:p text:style-name="P193">OperacaoFrete como classe central: <text:span text:style-name="T90">O</text:span>peracaoFrete é o núcleo do sistema. Ela conecta um Embarcador a um Transportador e guarda o status da operação (aguardando coleta, em trânsito, entregue), o valor do frete e a data de criação. Todo o fluxo financeiro e logístico passa por ela.</text:p>
      <text:p text:style-name="P193">Composição: dependência forte: Carga e EscrowLogistico têm composição com OperacaoFrete <text:s/>o losango preenchido indica que eles não existem sem a operação. A Carga guarda os dados físicos da mercadoria (tipo, peso, origem, destino). O EscrowLogistico guarda o valor retido, o status do bloqueio e os métodos para reter, liberar ou aplicar multa é a implementação da "Regra de Ouro" do documento.</text:p>
      <text:p text:style-name="P193">Agregação: dependência fraca: Seguro tem agregação com OperacaoFrete o losango vazio indica que o seguro pode existir de forma independente (a apólice continua válida mesmo que uma operação específica termine). Ele guarda o número da apólice, o status ativo/inativo e o valor de cobertura.</text:p>
      <text:p text:style-name="P193">Ocorrencia: <text:span text:style-name="T90">t</text:span>em associação simples com OperacaoFrete com multiplicidade 0, ou seja, uma operação pode ter zero ou várias ocorrências registradas. Cada ocorrência guarda o tipo (avaria, roubo, atraso), a descrição e o horário do registro, e pode notificar as partes automaticame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álico" style:font-family-generic="swiss" style:font-pitch="variable"/>
    <style:font-face style:name="Arial4" svg:font-family="Arial" style:font-adornments="Negrito" style:font-family-generic="swiss" style:font-pitch="variable"/>
    <style:font-face style:name="Arial5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" draw:display-name="Gradient 1" draw:style="linear" draw:start-color="#002060" draw:end-color="#487dbf" draw:start-intensity="100%" draw:end-intensity="100%" draw:angle="0deg" draw:border="24%">
      <loext:gradient-stop svg:offset="0" loext:color-type="rgb" loext:color-value="#002060"/>
      <loext:gradient-stop svg:offset="0.68421052631579" loext:color-type="rgb" loext:color-value="#1f497d"/>
      <loext:gradient-stop svg:offset="0.868421052631579" loext:color-type="rgb" loext:color-value="#2d5b93"/>
      <loext:gradient-stop svg:offset="0.986842105263158" loext:color-type="rgb" loext:color-value="#487dbf"/>
    </draw:gradient>
    <draw:fill-image draw:name="IMAGEM" xlink:href="Pictures/10000000000002EE000000D202A2374F.jpg" xlink:type="simple" xlink:show="embed" xlink:actuate="onLoad"/>
    <draw:fill-image draw:name="msFillBitmap_20_1_20_-1" draw:display-name="msFillBitmap 1 -1" xlink:href="Pictures/10000000000006400000015E16828E3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SimSu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宋体" style:font-family-asian="宋体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style:page-number="auto"/>
      <style:text-properties style:font-name="Arial5" fo:font-family="Arial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宋体" style:font-family-asian="宋体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line-height="150%" fo:text-align="justify" style:justify-single-word="false" fo:keep-together="always" fo:keep-with-next="always"/>
      <style:text-properties fo:color="#000000" loext:opacity="100%" style:font-name="Arial4" fo:font-family="Arial" style:font-style-name="Negrito" style:font-family-generic="swiss" style:font-pitch="variable" fo:font-size="12pt" fo:font-weight="bold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har" style:default-outline-level="3" style:class="text">
      <style:paragraph-properties fo:margin-top="0.071cm" fo:margin-bottom="0cm" style:contextual-spacing="false" fo:line-height="150%" fo:text-align="justify" style:justify-single-word="false" fo:keep-together="always" fo:keep-with-next="always"/>
      <style:text-properties fo:color="#000000" loext:opacity="100%" style:font-name="Arial5" fo:font-family="Arial" style:font-style-name="Norm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har" style:default-outline-level="4" style:class="text" style:master-page-name="">
      <style:paragraph-properties fo:margin-top="0.071cm" fo:margin-bottom="0cm" style:contextual-spacing="false" fo:line-height="150%" fo:text-align="center" style:justify-single-word="false" fo:keep-together="always" style:page-number="auto" fo:keep-with-next="always"/>
      <style:text-properties fo:color="#000000" loext:opacity="100%" style:font-name="Arial3" fo:font-family="Arial" style:font-style-name="Itálico" style:font-family-generic="swiss" style:font-pitch="variable" fo:font-size="12pt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.212cm" fo:margin-bottom="0cm" style:contextual-spacing="false">
        <style:tab-stops/>
      </style:paragraph-properties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Marginalia" style:family="paragraph" style:parent-style-name="Standard" style:class="text"/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ormal_20__28_Web_29_" style:display-name="Normal (Web)" style:family="paragraph">
      <style:paragraph-properties fo:margin-top="0.494cm" fo:margin-bottom="0.494cm" style:contextual-spacing="false" fo:line-height="115%" fo:text-align="start" style:justify-single-word="false" fo:orphans="2" fo:widows="2" style:writing-mode="lr-tb"/>
      <style:text-properties fo:language="en" fo:country="US" style:language-asian="zh" style:country-asian="CN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top="0.423cm" fo:margin-bottom="0.212cm" style:contextual-spacing="false">
        <style:tab-stops/>
      </style:paragraph-properties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hyphenation-ladder-count="no-limit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1" style:display-name="Tabela 1" style:family="paragraph" style:parent-style-name="Standard">
      <style:paragraph-properties fo:margin-top="0.106cm" fo:margin-bottom="0.106cm" style:contextual-spacing="false" style:line-height-at-least="0.423cm" fo:text-align="center" style:justify-single-word="false" fo:orphans="0" fo:widows="0" fo:hyphenation-ladder-count="no-limit" style:vertical-align="baseline" style:snap-to-layout-grid="false"/>
      <style:text-properties style:font-name="Arial1" fo:font-family="Arial" style:font-family-generic="swiss" style:font-pitch="variable" fo:font-size="9pt" fo:font-weight="bold" style:letter-kerning="true" style:font-name-asian="Calibri1" style:font-family-asian="Calibri" style:font-family-generic-asian="system" style:font-pitch-asian="variable" style:font-size-asian="9pt" style:font-weight-asian="bold" style:font-name-complex="Arial2" style:font-family-complex="Arial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do_20_Sumário1" style:display-name="Cabeçalho do Sumário1" style:family="paragraph" style:parent-style-name="Heading_20_1" style:next-style-name="Standard" style:default-outline-level="">
      <style:text-properties style:language-asian="pt" style:country-asian="BR"/>
    </style:style>
    <style:style style:name="Parágrafo_20_da_20_Lista1" style:display-name="Parágrafo da Lista1" style:family="paragraph" style:parent-style-name="Standard">
      <style:paragraph-properties fo:margin-left="1.27cm" fo:margin-top="0cm" fo:margin-bottom="0.353cm" style:contextual-spacing="true"/>
    </style:style>
    <style:style style:name="Table_20_Paragraph" style:display-name="Table Paragraph" style:family="paragraph" style:parent-style-name="Standard">
      <style:text-properties style:font-name="Arial1" fo:font-family="Arial" style:font-family-generic="swiss" style:font-pitch="variable" fo:language="en" fo:country="US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style:language-complex="en" style:country-complex="U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>
        <style:tab-stops/>
      </style:paragraph-properties>
      <style:text-properties style:language-asian="pt" style:country-asian="BR"/>
    </style:style>
    <style:style style:name="PI_20_TÍTULO_20_01" style:display-name="PI TÍTULO 01" style:family="paragraph" style:parent-style-name="Standard" loext:linked-style-name="PI_20_TÍTULO_20_01_20_Char" style:default-outline-level="1" style:list-style-name="">
      <style:paragraph-properties fo:margin-top="0.088cm" fo:margin-bottom="0.088cm" style:contextual-spacing="false" fo:line-height="100%" fo:text-align="justify" style:justify-single-word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PI_20_SEÇÃO_20_01" style:display-name="PI SEÇÃO 01" style:family="paragraph" style:parent-style-name="Standard" loext:linked-style-name="PI_20_SEÇÃO_20_01_20_Char" style:default-outline-level="2" style:list-style-name="">
      <style:paragraph-properties fo:margin-left="0cm" fo:margin-top="0.494cm" fo:margin-bottom="0.494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PI_20_SEÇÃO_20_2" style:display-name="PI SEÇÃO 2" style:family="paragraph" style:parent-style-name="Standard" loext:linked-style-name="PI_20_SEÇÃO_20_2_20_Char" style:default-outline-level="3" style:list-style-name="">
      <style:paragraph-properties fo:margin-top="0.494cm" fo:margin-bottom="0.494cm" style:contextual-spacing="false" fo:line-height="150%" fo:text-align="justify" style:justify-single-word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3_20_Char" style:display-name="Título 3 Ch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宋体" style:font-family-asian="宋体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1pt" fo:font-style="italic" style:font-name-asian="宋体" style:font-family-asian="宋体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I_20_TÍTULO_20_01_20_Char" style:display-name="PI TÍTULO 01 Char" style:family="text" style:parent-style-name="Default_20_Paragraph_20_Font" loext:linked-style-name="PI_20_TÍTULO_20_01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PI_20_SEÇÃO_20_01_20_Char" style:display-name="PI SEÇÃO 01 Char" style:family="text" style:parent-style-name="Default_20_Paragraph_20_Font" loext:linked-style-name="PI_20_SEÇÃO_20_01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PI_20_SEÇÃO_20_2_20_Char" style:display-name="PI SEÇÃO 2 Char" style:family="text" style:parent-style-name="Default_20_Paragraph_20_Font" loext:linked-style-name="PI_20_SEÇÃO_20_2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2" style:display-name="ListLabel 2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6pt" style:font-size-asian="6pt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>
      <style:text-properties style:font-name="Times New Roman" fo:font-family="'Times New Roman'" style:font-family-generic="roman" style:font-pitch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Times New Roman" fo:font-family="'Times New Roman'" style:font-family-generic="roman" style:font-pitch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30" style:display-name="ListLabel 3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39" style:display-name="ListLabel 39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48" style:display-name="ListLabel 48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66" style:display-name="ListLabel 66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75" style:display-name="ListLabel 75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>
      <style:text-properties fo:font-size="10pt" style:font-size-asian="10pt"/>
    </style:style>
    <style:style style:name="ListLabel_20_495" style:display-name="ListLabel 495" style:family="text">
      <style:text-properties fo:font-size="10pt" style:font-size-asian="10pt"/>
    </style:style>
    <style:style style:name="ListLabel_20_496" style:display-name="ListLabel 496" style:family="text">
      <style:text-properties fo:font-size="10pt" style:font-size-asian="10pt"/>
    </style:style>
    <style:style style:name="ListLabel_20_497" style:display-name="ListLabel 49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fo:font-size="10pt" style:font-size-asian="10pt"/>
    </style:style>
    <style:style style:name="ListLabel_20_506" style:display-name="ListLabel 50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ListLabel_20_523" style:display-name="ListLabel 523" style:family="text">
      <style:text-properties fo:font-size="10pt" style:font-size-asian="10pt"/>
    </style:style>
    <style:style style:name="ListLabel_20_524" style:display-name="ListLabel 52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25" style:display-name="ListLabel 525" style:family="text">
      <style:text-properties fo:font-size="10pt" style:font-size-asian="10pt"/>
    </style:style>
    <style:style style:name="ListLabel_20_526" style:display-name="ListLabel 526" style:family="text">
      <style:text-properties fo:font-size="10pt" style:font-size-asian="10pt"/>
    </style:style>
    <style:style style:name="ListLabel_20_527" style:display-name="ListLabel 527" style:family="text">
      <style:text-properties fo:font-size="10pt" style:font-size-asian="10pt"/>
    </style:style>
    <style:style style:name="ListLabel_20_528" style:display-name="ListLabel 528" style:family="text">
      <style:text-properties fo:font-size="10pt" style:font-size-asian="10pt"/>
    </style:style>
    <style:style style:name="ListLabel_20_529" style:display-name="ListLabel 529" style:family="text">
      <style:text-properties fo:font-size="10pt" style:font-size-asian="10pt"/>
    </style:style>
    <style:style style:name="ListLabel_20_530" style:display-name="ListLabel 530" style:family="text">
      <style:text-properties fo:font-size="10pt" style:font-size-asian="10pt"/>
    </style:style>
    <style:style style:name="ListLabel_20_531" style:display-name="ListLabel 531" style:family="text">
      <style:text-properties fo:font-size="10pt" style:font-size-asian="10pt"/>
    </style:style>
    <style:style style:name="ListLabel_20_532" style:display-name="ListLabel 532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48cm" fo:text-indent="-1.748cm" fo:margin-left="1.748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48cm" fo:text-indent="-2.748cm" fo:margin-left="2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30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3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3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39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4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4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4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48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1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54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66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69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72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75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78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1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 style:list-style-name="WWNum1" style:master-page-name="">
      <loext:graphic-properties draw:fill="none"/>
      <style:paragraph-properties fo:margin-left="-1.101cm" fo:margin-right="-0.80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14.901cm" style:type="right"/>
        </style:tab-stops>
      </style:paragraph-properties>
    </style:style>
    <style:style style:name="MP2" style:family="paragraph">
      <loext:graphic-properties draw:fill="solid" draw:fill-color="#ffffff" draw:opacity="88%"/>
      <style:paragraph-properties fo:text-align="start" style:writing-mode="lr-tb"/>
      <style:text-properties fo:font-size="18pt"/>
    </style:style>
    <style:style style:name="MP3" style:family="paragraph" style:parent-style-name="Frame_20_contents" style:list-style-name="WWNum1">
      <style:paragraph-properties fo:margin-left="0cm" fo:margin-top="0cm" fo:margin-bottom="0cm" style:contextual-spacing="false" fo:line-height="100%" fo:text-indent="0cm" style:auto-text-indent="false">
        <style:tab-stops/>
      </style:paragraph-properties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P5" style:family="paragraph" style:parent-style-name="Footer" style:list-style-name="WWNum1">
      <style:paragraph-properties fo:margin-left="0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>
      <loext:graphic-properties draw:fill="bitmap" draw:fill-image-name="msFillBitmap_20_1_20_-1" draw:fill-image-width="16.935cm" draw:fill-image-height="3.704cm" style:repeat="repeat" draw:fill-image-ref-point-x="0%" draw:fill-image-ref-point-y="76%" draw:fill-image-ref-point="top-left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T1" style:family="text">
      <style:text-properties fo:color="#ffffff" loext:opacity="100%" fo:font-size="7pt" style:font-size-asian="7pt">
        <loext:char-complex-color loext:theme-type="light1" loext:color-type="theme"/>
      </style:text-properties>
    </style:style>
    <style:style style:name="MT2" style:family="text">
      <style:text-properties fo:font-size="48pt" style:font-size-asian="48pt" style:language-asian="pt" style:country-asian="BR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none" svg:stroke-width="0.071cm" svg:stroke-linecap="butt" draw:fill="solid" draw:fill-color="#ffffff" draw:opacity="88%" draw:textarea-vertical-align="top" draw:auto-grow-height="false" fo:min-height="15.335cm" fo:min-width="21.258cm" fo:padding-top="0.125cm" fo:padding-bottom="0.125cm" fo:padding-left="0.25cm" fo:padding-right="0.25cm" fo:wrap-option="wrap" style:writing-mode="lr-tb" loext:decorative="false" fo:margin-left="0cm" fo:margin-right="0.032cm" fo:margin-top="0cm" fo:margin-bottom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  <style:paragraph-properties style:writing-mode="lr-tb"/>
    </style:style>
    <style:style style:name="Mgr2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71cm" svg:stroke-linecap="butt" draw:fill="bitmap" draw:fill-image-name="msFillBitmap_20_1_20_-1" draw:fill-image-width="16.935cm" draw:fill-image-height="3.704cm" style:repeat="repeat" draw:fill-image-ref-point-x="0%" draw:fill-image-ref-point-y="76%" draw:fill-image-ref-point="top-left" draw:textarea-vertical-align="top" draw:auto-grow-height="false" fo:min-height="1.965cm" fo:min-width="20.36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cm" loext:decorative="false" fo:margin-left="0cm" fo:margin-right="0.012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.071cm" svg:stroke-linecap="butt" draw:fill="gradient" draw:fill-gradient-name="Gradient_20_1" draw:textarea-vertical-align="top" draw:auto-grow-height="false" fo:min-height="0.633cm" fo:min-width="20.556cm" fo:padding-top="0.125cm" fo:padding-bottom="0.125cm" fo:padding-left="0.25cm" fo:padding-right="0.25cm" fo:wrap-option="wrap" draw:shadow="visible" draw:shadow-offset-x="-0.245cm" draw:shadow-offset-y="0.018cm" draw:shadow-color="#0070c0" draw:shadow-opacity="20%" loext:shadow-blur="0.706cm" loext:glow-radius="0.247cm" loext:glow-color="#558ed5" loext:glow-transparency="0%" loext:softedge-radius="0.035cm" loext:decorative="false" fo:margin-left="0.788cm" fo:margin-right="0.289cm" fo:margin-top="0.404cm" fo:margin-bottom="0.4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0.902cm" fo:page-height="29.603cm" style:num-format="1" style:print-orientation="portrait" fo:margin-top="1.249cm" fo:margin-bottom="0.409cm" fo:margin-left="3cm" fo:margin-right="2.148cm" fo:background-color="transparent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IMAGEM" draw:opacity="60%" draw:fill-image-width="21.481cm" draw:fill-image-height="10.23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2EE000000D202A2374F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2.09cm" fo:margin-left="0cm" fo:margin-right="0cm" fo:margin-top="1.99cm" style:dynamic-spacing="true"/>
      </style:footer-style>
    </style:page-layout>
    <style:style style:name="Mdp1" style:family="drawing-page">
      <style:drawing-page-properties draw:fill="bitmap" draw:background-size="full" draw:fill-image-name="IMAGEM" draw:opacity="60%" draw:fill-image-width="21.481cm" draw:fill-image-height="10.239cm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list xml:id="list3517112619" text:style-name="WWNum1">
          <text:list-header>
            <text:p text:style-name="MP1"><draw:custom-shape text:anchor-type="char" draw:z-index="30" draw:name="Retângulo 2" draw:style-name="Mgr1" draw:text-style-name="MP2" svg:width="21.758cm" svg:height="15.585cm" draw:transform="rotate (0.00523598775598299) translate (-3.93876388888889cm 7.11729166666667cm)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29" text:anchor-type="as-char" svg:y="-2.972cm" svg:width="5.636cm" svg:height="1.027cm" draw:z-index="185"><draw:image xlink:href="Pictures/10000001000003BC000000AEA37A2267.png" xlink:type="simple" xlink:show="embed" xlink:actuate="onLoad" draw:mime-type="image/png"/></draw:frame><text:s text:c="13"/><draw:custom-shape text:anchor-type="char" draw:z-index="123" draw:name="Caixa de Texto 6" draw:style-name="Mgr2" draw:text-style-name="MP4" svg:width="18.259cm" svg:height="1.32cm" svg:x="8.281cm" svg:y="26.674cm"><text:list text:style-name="WWNum1"><text:list-item><text:p text:style-name="MP3" loext:marker-style-name="MT1"><text:span text:style-name="MT1">Av. Universitária Km 3,5 - Cidade Universitária – Anápolis/GO, CEP 75083-515</text:span><text:span text:style-name="MT1"/></text:p></text:list-item><text:list-item><text:p text:style-name="MP3" loext:marker-style-name="MT1"><text:span text:style-name="MT1">Secretaria Setorial – Bloco I</text:span><text:span text:style-name="MT1"/></text:p></text:list-item><text:list-item><text:p text:style-name="MP3" loext:marker-style-name="MT1"><text:span text:style-name="MT1">Fone: (62) 3310 6658 | FAX: (62) 3310 6607</text:span></text:p></text:list-item></text:list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<text:s text:c="14"/></text:span><draw:frame draw:style-name="Mfr1" draw:name="Imagem 31" text:anchor-type="as-char" svg:y="-3.304cm" svg:width="3.676cm" svg:height="1.365cm" draw:z-index="217"><draw:image xlink:href="Pictures/1000000100000E160000053BC1172DFB.png" xlink:type="simple" xlink:show="embed" xlink:actuate="onLoad" draw:mime-type="image/png"/></draw:frame></text:p>
          </text:list-header>
        </text:list>
      </style:header>
      <style:footer>
        <text:list text:style-name="WWNum1">
          <text:list-item>
            <text:p text:style-name="MP5"><draw:custom-shape text:anchor-type="char" draw:z-index="92" draw:name="Retângulo 9" draw:style-name="Mgr3" draw:text-style-name="MP6" svg:width="20.864cm" svg:height="2.214cm" svg:x="-2.965cm" svg:y="-1.33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1" draw:name="Retângulo 1" draw:style-name="Mgr4" draw:text-style-name="MP7" svg:width="21.056cm" svg:height="0.883cm" svg:x="-3.156cm" svg:y="1.298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DLUCCA SILVA CARVALHO</meta:initial-creator>
    <meta:editing-cycles>141</meta:editing-cycles>
    <meta:print-date>2026-05-13T11:35:22.366511463</meta:print-date>
    <meta:creation-date>2026-02-05T15:55:00</meta:creation-date>
    <dc:date>2026-05-13T11:35:46.426239174</dc:date>
    <meta:editing-duration>PT11H31M43S</meta:editing-duration>
    <meta:generator>LibreOffice/24.2.7.2$Linux_X86_64 LibreOffice_project/420$Build-2</meta:generator>
    <meta:printed-by>Arquivos PDF</meta:printed-by>
    <meta:document-statistic meta:table-count="20" meta:image-count="7" meta:object-count="0" meta:page-count="31" meta:paragraph-count="404" meta:word-count="5426" meta:character-count="36365" meta:non-whitespace-character-count="31240"/>
    <meta:user-defined meta:name="AppVersion">16.0000</meta:user-defined>
    <meta:user-defined meta:name="KSOProductBuildVer">1046-10.1.0.5656</meta:user-defined>
    <meta:template xlink:type="simple" xlink:actuate="onRequest" xlink:title="Normal.dotm" xlink:href=""/>
  </office:meta>
</office:document-meta>
</file>